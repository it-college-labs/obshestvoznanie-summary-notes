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 style:parent-style-name="Graphics">
      <style:graphic-properties draw:fill="none" fo:clip="rect(0in 0in 0in 0in)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25in" fo:text-align="justify" fo:text-align-last="start" style:tab-stop-distance="1in" fo:margin-left="0in" fo:margin-right="0in" fo:text-indent="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8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25in" fo:text-align="justify" fo:text-align-last="start" style:tab-stop-distance="1in" fo:margin-left="0in" fo:margin-right="0in" fo:text-indent="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0.25in" fo:text-align="justify" fo:text-align-last="start" style:tab-stop-distance="1in" fo:margin-left="0in" fo:margin-right="0in" fo:text-indent="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8" style:parent-style-name="Graphics">
      <style:graphic-properties draw:fill="none" fo:clip="rect(0in 0in 0in 0in)" draw:stroke="none"/>
    </style:style>
    <style:style style:family="drawing-page" style:name="a128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0.25in" fo:text-align="justify" fo:text-align-last="start" style:tab-stop-distance="1in" fo:margin-left="0in" fo:margin-right="0in" fo:text-indent="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0.25in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0.25in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295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2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Kazimir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.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Kazimir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Kazimir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.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1.33333in" style:font-size-asian="1.33333in" style:font-size-complex="1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3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Kazimir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.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4">
      <style:drawing-page-properties draw:fill="solid" draw:fill-color="#ffffff" draw:opacity="100%" presentation:transition-type="manual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T Sans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3366cc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645ad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6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94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95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G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.10417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5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 Francisco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0.33333in" fo:text-align="left" style:tab-stop-distance="1in" fo:margin-left="0in" fo:margin-right="0in" fo:text-indent="0in" fo:margin-top="0.3125in" fo:margin-bottom="0.20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9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4%" fo:text-align="center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solid" draw:fill-color="#156082" draw:opacity="100%" draw:stroke="solid" svg:stroke-width="0.02087in" svg:stroke-color="#042433" svg:stroke-opacity="100%" draw:stroke-linejoin="miter" style:protect="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0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/>
        <style:text-properties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96">
      <text:list-level-style-bullet text:level="1" text:bullet-char="-">
        <style:list-level-properties text:space-before="0in" text:min-label-width="0.3126in"/>
        <style:text-properties fo:font-family="StarSymbol" fo:font-size="100%"/>
      </text:list-level-style-bullet>
      <text:list-level-style-bullet text:level="2" text:bullet-char="-">
        <style:list-level-properties text:space-before="0.47244in" text:min-label-width="0.3126in"/>
        <style:text-properties fo:font-family="StarSymbol" fo:font-size="100%"/>
      </text:list-level-style-bullet>
      <text:list-level-style-bullet text:level="3" text:bullet-char="-">
        <style:list-level-properties text:space-before="0.94488in" text:min-label-width="0.3126in"/>
        <style:text-properties fo:font-family="StarSymbol" fo:font-size="100%"/>
      </text:list-level-style-bullet>
      <text:list-level-style-bullet text:level="4" text:bullet-char="-">
        <style:list-level-properties text:space-before="1.41732in" text:min-label-width="0.3126in"/>
        <style:text-properties fo:font-family="StarSymbol" fo:font-size="100%"/>
      </text:list-level-style-bullet>
      <text:list-level-style-bullet text:level="5" text:bullet-char="-">
        <style:list-level-properties text:space-before="1.88976in" text:min-label-width="0.3126in"/>
        <style:text-properties fo:font-family="StarSymbol" fo:font-size="100%"/>
      </text:list-level-style-bullet>
      <text:list-level-style-bullet text:level="6" text:bullet-char="-">
        <style:list-level-properties text:space-before="2.3622in" text:min-label-width="0.3126in"/>
        <style:text-properties fo:font-family="StarSymbol" fo:font-size="100%"/>
      </text:list-level-style-bullet>
      <text:list-level-style-bullet text:level="7" text:bullet-char="-">
        <style:list-level-properties text:space-before="2.83465in" text:min-label-width="0.3126in"/>
        <style:text-properties fo:font-family="StarSymbol" fo:font-size="100%"/>
      </text:list-level-style-bullet>
      <text:list-level-style-bullet text:level="8" text:bullet-char="-">
        <style:list-level-properties text:space-before="3.30709in" text:min-label-width="0.3126in"/>
        <style:text-properties fo:font-family="StarSymbol" fo:font-size="100%"/>
      </text:list-level-style-bullet>
      <text:list-level-style-bullet text:level="9" text:bullet-char="-">
        <style:list-level-properties text:space-before="3.77953in" text:min-label-width="0.3126in"/>
        <style:text-properties fo:font-family="StarSymbol" fo:font-size="100%"/>
      </text:list-level-style-bullet>
    </text:list-style>
    <text:list-style style:name="a13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999">
      <text:list-level-style-bullet text:level="1" text:bullet-char="-">
        <style:list-level-properties text:space-before="0in" text:min-label-width="0.3126in"/>
        <style:text-properties fo:font-family="StarSymbol" fo:font-size="100%"/>
      </text:list-level-style-bullet>
      <text:list-level-style-bullet text:level="2" text:bullet-char="-">
        <style:list-level-properties text:space-before="0.47244in" text:min-label-width="0.3126in"/>
        <style:text-properties fo:font-family="StarSymbol" fo:font-size="100%"/>
      </text:list-level-style-bullet>
      <text:list-level-style-bullet text:level="3" text:bullet-char="-">
        <style:list-level-properties text:space-before="0.94488in" text:min-label-width="0.3126in"/>
        <style:text-properties fo:font-family="StarSymbol" fo:font-size="100%"/>
      </text:list-level-style-bullet>
      <text:list-level-style-bullet text:level="4" text:bullet-char="-">
        <style:list-level-properties text:space-before="1.41732in" text:min-label-width="0.3126in"/>
        <style:text-properties fo:font-family="StarSymbol" fo:font-size="100%"/>
      </text:list-level-style-bullet>
      <text:list-level-style-bullet text:level="5" text:bullet-char="-">
        <style:list-level-properties text:space-before="1.88976in" text:min-label-width="0.3126in"/>
        <style:text-properties fo:font-family="StarSymbol" fo:font-size="100%"/>
      </text:list-level-style-bullet>
      <text:list-level-style-bullet text:level="6" text:bullet-char="-">
        <style:list-level-properties text:space-before="2.3622in" text:min-label-width="0.3126in"/>
        <style:text-properties fo:font-family="StarSymbol" fo:font-size="100%"/>
      </text:list-level-style-bullet>
      <text:list-level-style-bullet text:level="7" text:bullet-char="-">
        <style:list-level-properties text:space-before="2.83465in" text:min-label-width="0.3126in"/>
        <style:text-properties fo:font-family="StarSymbol" fo:font-size="100%"/>
      </text:list-level-style-bullet>
      <text:list-level-style-bullet text:level="8" text:bullet-char="-">
        <style:list-level-properties text:space-before="3.30709in" text:min-label-width="0.3126in"/>
        <style:text-properties fo:font-family="StarSymbol" fo:font-size="100%"/>
      </text:list-level-style-bullet>
      <text:list-level-style-bullet text:level="9" text:bullet-char="-">
        <style:list-level-properties text:space-before="3.77953in" text:min-label-width="0.3126in"/>
        <style:text-properties fo:font-family="StarSymbol" fo:font-size="100%"/>
      </text:list-level-style-bullet>
    </text:list-style>
    <text:list-style style:name="a131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</office:automatic-styles>
  <office:body>
    <office:presentation>
      <draw:page draw:name="Slide1" draw:style-name="a901" draw:master-page-name="Master1-Layout7-blank-Пустой-слайд" presentation:presentation-page-layout-name="Master1-PPL7">
        <draw:frame draw:id="id130" presentation:style-name="a904" draw:name="PlaceHolder 1" svg:x="2.09488in" svg:y="1.00669in" svg:width="9.14331in" svg:height="2.2937in" presentation:class="title" presentation:placeholder="false">
          <draw:text-box>
            <text:p text:style-name="a903" text:class-names="" text:cond-style-name=""><text:span text:style-name="a902" text:class-names="">Семья и брак</text:span></text:p>
          </draw:text-box>
          <svg:desc/>
        </draw:frame>
        <presentation:notes draw:style-name="a910">
          <draw:frame draw:id="id131" draw:style-name="a907" draw:name="Номер слайда 6" svg:x="4.67953in" svg:y="11.10827in" svg:width="3.5878in" svg:height="0.58425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desc/>
          </draw:frame>
          <draw:page-thumbnail draw:page-number="1" svg:x="0.2378in" svg:y="0.88898in" svg:width="7.78976in" svg:height="4.38386in" presentation:class="page" draw:id="id132" presentation:style-name="a908" draw:name="Образ слайда 1">
            <svg:desc/>
          </draw:page-thumbnail>
          <draw:frame draw:id="id133" presentation:style-name="a909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911" draw:master-page-name="Master2-Layout1-title-Титульный-слайд" presentation:presentation-page-layout-name="Master2-PPL1">
        <draw:frame draw:id="id134" presentation:style-name="a914" draw:name="Заголовок 1" svg:x="1.66654in" svg:y="0.49488in" svg:width="10in" svg:height="0.79567in" presentation:class="title" presentation:placeholder="false">
          <draw:text-box>
            <text:p text:style-name="a913" text:class-names="" text:cond-style-name=""><text:span text:style-name="a912" text:class-names="">Брак</text:span></text:p>
          </draw:text-box>
          <svg:desc/>
        </draw:frame>
        <draw:frame draw:id="id135" presentation:style-name="a957" draw:name="Подзаголовок 2" svg:x="1.66654in" svg:y="1.69488in" svg:width="10.51929in" svg:height="1.81063in" presentation:class="subtitle" presentation:placeholder="false">
          <draw:text-box>
            <text:p text:style-name="a928" text:class-names="" text:cond-style-name=""><text:span text:style-name="a915" text:class-names="">Бра́чный сою́з</text:span><text:span text:style-name="a916" text:class-names=""> — легально утверждённое добровольное и свободное объединение </text:span><text:span text:style-name="a917" text:class-names="">женщины</text:span><text:span text:style-name="a918" text:class-names=""> и мужчины, целью которого является создание </text:span><text:span text:style-name="a919" text:class-names=""><text:a xlink:href="https://znanierussia.ru/articles/Семья" text:style-name="" text:visited-style-name="">семьи</text:a></text:span><text:span text:style-name="a920" text:class-names=""> и возникновение взаимных личных и имущественных прав и обязанностей для </text:span><text:span text:style-name="a921" text:class-names="">супругов</text:span><text:span text:style-name="a922" text:class-names=""><text:a xlink:href="https://znanierussia.ru/articles/Брачный_союз#cite_note-1" text:style-name="" text:visited-style-name="">[1]</text:a></text:span><text:span text:style-name="a923" text:class-names="">. В </text:span><text:span text:style-name="a924" text:class-names=""><text:a xlink:href="https://znanierussia.ru/articles/Российская_Федерация" text:style-name="" text:visited-style-name="">Российской Федерации</text:a></text:span><text:span text:style-name="a925" text:class-names=""> государственную поддержку получает только брак, зарегистрированный в органах ЗАГС (записи актов гражданского состояния) фактические брачные отношения, а также брак, заключённый по религиозным обрядам, не признаются </text:span><text:span text:style-name="a926" text:class-names=""><text:a xlink:href="https://znanierussia.ru/articles/Государство" text:style-name="" text:visited-style-name="">государством</text:a></text:span><text:span text:style-name="a927" text:class-names="">.</text:span></text:p>
            <text:p text:style-name="a956" text:class-names="" text:cond-style-name=""><text:span text:style-name="a929" text:class-names="">Брак</text:span><text:span text:style-name="a930" text:class-names=""> (производное от глагола </text:span><text:span text:style-name="a931" text:class-names="">брать</text:span><text:span text:style-name="a932" text:class-names=""><text:a xlink:href="https://ru.wikipedia.org/wiki/Брачный_союз#cite_note-1" text:style-name="" text:visited-style-name="">[1]</text:a></text:span><text:span text:style-name="a933" text:class-names="">), или </text:span><text:span text:style-name="a934" text:class-names="">бра́чный сою́з</text:span><text:span text:style-name="a935" text:class-names="">, </text:span><text:span text:style-name="a936" text:class-names="">супру́жество</text:span><text:span text:style-name="a937" text:class-names=""> — один из старейших </text:span><text:span text:style-name="a938" text:class-names=""><text:a xlink:href="https://ru.wikipedia.org/wiki/Социальный_институт" text:style-name="" text:visited-style-name="">общественных институтов</text:a></text:span><text:span text:style-name="a939" text:class-names="">, который упорядочивает </text:span><text:span text:style-name="a940" text:class-names=""><text:a xlink:href="https://ru.wikipedia.org/wiki/Межличностные_отношения" text:style-name="" text:visited-style-name="">межличностные</text:a></text:span><text:span text:style-name="a941" text:class-names=""> и </text:span><text:span text:style-name="a942" text:class-names=""><text:a xlink:href="https://ru.wikipedia.org/wiki/Сексуальное_поведение_человека" text:style-name="" text:visited-style-name="">сексуальные отношения</text:a></text:span><text:span text:style-name="a943" text:class-names="">, признаваемый </text:span><text:span text:style-name="a944" text:class-names=""><text:a xlink:href="https://ru.wikipedia.org/wiki/Общество" text:style-name="" text:visited-style-name="">обществом</text:a></text:span><text:span text:style-name="a945" text:class-names=""> союз между </text:span><text:span text:style-name="a946" text:class-names=""><text:a xlink:href="https://ru.wikipedia.org/wiki/Супруги" text:style-name="" text:visited-style-name="">супругами</text:a></text:span><text:span text:style-name="a947" text:class-names=""> с целью создания </text:span><text:span text:style-name="a948" text:class-names=""><text:a xlink:href="https://ru.wikipedia.org/wiki/Семья" text:style-name="" text:visited-style-name="">семьи</text:a></text:span><text:span text:style-name="a949" text:class-names="">, который порождает </text:span><text:span text:style-name="a950" text:class-names=""><text:a xlink:href="https://ru.wikipedia.org/wiki/Правоотношение" text:style-name="" text:visited-style-name="">взаимные</text:a></text:span><text:span text:style-name="a951" text:class-names=""> </text:span><text:span text:style-name="a952" text:class-names=""><text:a xlink:href="https://ru.wikipedia.org/wiki/Субъективное_право" text:style-name="" text:visited-style-name="">права</text:a></text:span><text:span text:style-name="a953" text:class-names=""> и </text:span><text:span text:style-name="a954" text:class-names=""><text:a xlink:href="https://ru.wikipedia.org/wiki/Обязательство" text:style-name="" text:visited-style-name="">обязанности</text:a></text:span><text:span text:style-name="a955" text:class-names=""> брачной пары.</text:span></text:p>
          </draw:text-box>
          <svg:desc/>
        </draw:frame>
        <presentation:notes draw:style-name="a960">
          <draw:page-thumbnail draw:page-number="2" svg:x="1.21063in" svg:y="0.88858in" svg:width="5.84567in" svg:height="4.38425in" presentation:class="page" draw:id="id136" presentation:style-name="a958" draw:name="Образ слайда 1">
            <svg:desc/>
          </draw:page-thumbnail>
          <draw:frame draw:id="id137" presentation:style-name="a959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961" draw:master-page-name="Master2-Layout2-obj-Заголовок-и-объект" presentation:presentation-page-layout-name="Master2-PPL2">
        <draw:frame draw:id="id138" presentation:style-name="a964" draw:name="Заголовок 1" svg:x="0.66654in" svg:y="0.29921in" svg:width="11.99961in" svg:height="1.25197in" presentation:class="title" presentation:placeholder="false">
          <draw:text-box>
            <text:p text:style-name="a963" text:class-names="" text:cond-style-name=""><text:span text:style-name="a962" text:class-names="">Отличие</text:span></text:p>
          </draw:text-box>
          <svg:desc/>
        </draw:frame>
        <draw:frame draw:id="id139" presentation:style-name="a974" draw:name="Объект 2" svg:x="0.94173in" svg:y="1.75472in" svg:width="11.72441in" svg:height="4.94961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65" text:class-names="">В юридической энциклопедии отмечается, что </text:span><text:span text:style-name="a966" text:class-names="">брак</text:span><text:span text:style-name="a967" text:class-names=""> — это союз женщины и мужчины, заключенный в установленном законом порядке с целью создания </text:span><text:span text:style-name="a968" text:class-names="">семьи</text:span><text:span text:style-name="a969" text:class-names="">, а </text:span><text:span text:style-name="a970" text:class-names="">семья</text:span><text:span text:style-name="a971" text:class-names=""> — круг лиц, объединенных взаимными правами и обязанностями, предусмотренными различными правовыми нормами.</text:span></text:p>
              </text:list-item>
            </text:list>
          </draw:text-box>
          <svg:desc/>
        </draw:frame>
        <presentation:notes draw:style-name="a977">
          <draw:page-thumbnail draw:page-number="3" svg:x="1.21063in" svg:y="0.88858in" svg:width="5.84567in" svg:height="4.38425in" presentation:class="page" draw:id="id140" presentation:style-name="a975" draw:name="Образ слайда 1">
            <svg:desc/>
          </draw:page-thumbnail>
          <draw:frame draw:id="id141" presentation:style-name="a976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978" draw:master-page-name="Master2-Layout7-blank-Пустой-слайд" presentation:presentation-page-layout-name="Master2-PPL7">
        <draw:frame draw:id="id142" presentation:style-name="a981" draw:name="Заголовок 1" svg:x="0.66654in" svg:y="0.29921in" svg:width="11.99961in" svg:height="1.25197in" presentation:class="title" presentation:placeholder="false">
          <draw:text-box>
            <text:p text:style-name="a980" text:class-names="" text:cond-style-name=""><text:span text:style-name="a979" text:class-names="">Что такое семья?</text:span></text:p>
          </draw:text-box>
          <svg:desc/>
        </draw:frame>
        <draw:frame draw:id="id143" presentation:style-name="a1003" draw:name="Текст 2" svg:x="7.24173in" svg:y="1.9874in" svg:width="5.85551in" svg:height="4.98465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Семейное законодательство устанавливает: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 - порядок осуществления и защиты семейных прав,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 - условия и порядок вступления в брак,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- прекращения брака и признания его недействительным,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регулирует личные неимущественные и имущественные отношения между членами семьи: супругами, родителями и детьми (усыновителями и усыновленными), а в случаях и в пределах, предусмотренных семейным законодательством, между другими родственниками и иными лицами,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определяет порядок выявления детей, оставшихся без попечения родителей, формы и порядок их устройства в семью, а также их временного устройства, в том числе в организацию для детей-сирот и детей, оставшихся без попечения родителей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line-break/></text:span></text:p>
              </text:list-item>
            </text:list>
          </draw:text-box>
          <svg:desc/>
        </draw:frame>
        <draw:frame draw:id="id144" presentation:style-name="a1029" draw:name="Текст 3" svg:x="1.15472in" svg:y="1.89409in" svg:width="5.85551in" svg:height="4.94961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Семейный кодекс <text:s text:c="1"/>Российской Федерации не содержит определение «семья».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7" text:class-names="">П</text:span><text:span text:style-name="a1008" text:class-names="">реамбула Конвенции ООН о правах ребенка 1989 г.: «семья рассматривается как основная ячейка общества и естественная среда для роста и благополучия всех ее членов, особенно детей, которой должны быть предоставлены необходимые защита и содействие с тем, чтобы она могла полностью возложить на себя обязанности в рамках общества»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1" text:class-names="">Википедия:<text:s text:c="1"/></text:span><text:span text:style-name="a1012" text:class-names="">Семья — </text:span><text:span text:style-name="a1013" text:class-names="">основанная на браке или кровном родстве малая группа, члены которой связаны<text:s text:c="1"/></text:span><text:span text:style-name="a1014" text:class-names="">общностью быта</text:span><text:span text:style-name="a1015" text:class-names="">, взаимной помощью,<text:s text:c="1"/></text:span><text:span text:style-name="a1016" text:class-names="">моральной и правовой ответственностью</text:span><text:span text:style-name="a1017" text:class-names="">.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desc/>
        </draw:frame>
        <presentation:notes draw:style-name="a1035">
          <draw:frame draw:id="id145" draw:style-name="a1032" draw:name="Номер слайда 6" svg:x="4.67953in" svg:y="11.10827in" svg:width="3.5878in" svg:height="0.58425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desc/>
          </draw:frame>
          <draw:page-thumbnail draw:page-number="4" svg:x="0.2378in" svg:y="0.88898in" svg:width="7.78976in" svg:height="4.38386in" presentation:class="page" draw:id="id146" presentation:style-name="a1033" draw:name="Образ слайда 1">
            <svg:desc/>
          </draw:page-thumbnail>
          <draw:frame draw:id="id147" presentation:style-name="a1034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1036" draw:master-page-name="Master2-Layout7-blank-Пустой-слайд" presentation:presentation-page-layout-name="Master2-PPL7">
        <draw:frame draw:id="id148" presentation:style-name="a1055" draw:name="PlaceHolder 1" svg:x="1.73228in" svg:y="1.57205in" svg:width="10.49921in" svg:height="1.30118in" presentation:class="title" presentation:placeholder="false">
          <draw:text-box>
            <text:p text:style-name="a1054" text:class-names="" text:cond-style-name=""><text:span text:style-name="a1037" text:class-names="">Функции семьи:<text:line-break/></text:span><text:span text:style-name="a1038" text:class-names=""><text:line-break/></text:span><text:span text:style-name="a1039" text:class-names="">Репродуктивная</text:span><text:span text:style-name="a1040" text:class-names=""> – воспроизводство рода;<text:line-break/></text:span><text:span text:style-name="a1041" text:class-names="">Воспитательная/духовно-нравственная</text:span><text:span text:style-name="a1042" text:class-names=""> – социализация подрастающего поколения;<text:line-break/></text:span><text:span text:style-name="a1043" text:class-names="">Хозяйственная/Экономическая</text:span><text:span text:style-name="a1044" text:class-names=""> – в традиционном обществе семья также являлась основной производственной ячейкой, а в современных обществах эта функция сводится ко взаимному материальному обеспечению и совместному быту ее членов;<text:line-break/></text:span><text:span text:style-name="a1045" text:class-names="">Досуговая</text:span><text:span text:style-name="a1046" text:class-names=""> – совместное проведение свободного времени;<text:line-break/></text:span><text:span text:style-name="a1047" text:class-names="">Психологическая</text:span><text:span text:style-name="a1048" text:class-names=""> – эмоциональная поддержка членов семьи.<text:line-break/></text:span><text:span text:style-name="a1049" text:class-names="">Социально-статусная</text:span><text:span text:style-name="a1050" text:class-names=""> – родившись в семье, человек приобретает конкретный социальный статус. Также, обзаведясь собственной семьёй, индивид может изменить свой статусно-ролевой набор.<text:line-break/></text:span><text:span text:style-name="a1051" text:class-names="">Защитная</text:span><text:span text:style-name="a1052" text:class-names=""> – семья, как первичный социальный институт, защищает своих членов как физически, так и психически.<text:line-break/></text:span><text:span text:style-name="a1053" text:class-names="">Регуляция сексуального поведения</text:span></text:p>
          </draw:text-box>
          <svg:desc/>
        </draw:frame>
        <presentation:notes draw:style-name="a1061">
          <draw:frame draw:id="id149" draw:style-name="a1058" draw:name="Номер слайда 6" svg:x="4.67953in" svg:y="11.10827in" svg:width="3.5878in" svg:height="0.58425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desc/>
          </draw:frame>
          <draw:page-thumbnail draw:page-number="5" svg:x="0.2378in" svg:y="0.88898in" svg:width="7.79173in" svg:height="4.38386in" presentation:class="page" draw:id="id150" presentation:style-name="a1059" draw:name="Образ слайда 1">
            <svg:desc/>
          </draw:page-thumbnail>
          <draw:frame draw:id="id151" presentation:style-name="a1060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1062" draw:master-page-name="Master2-Layout7-blank-Пустой-слайд" presentation:presentation-page-layout-name="Master2-PPL7">
        <draw:frame draw:id="id152" presentation:style-name="a1063" draw:name="PlaceHolder 1" svg:x="1.5in" svg:y="0.75in" svg:width="10.49921in" svg:height="1.62441in" presentation:class="title" presentation:placeholder="true">
          <draw:text-box/>
          <svg:desc/>
        </draw:frame>
        <draw:frame draw:id="id153" draw:style-name="a1064" draw:name="Picture 2" svg:x="1.97992in" svg:y="0in" svg:width="9.53898in" svg:height="7.5in" style:rel-width="scale" style:rel-height="scale">
          <draw:image xlink:href="media/image1.png" xlink:type="simple" xlink:show="embed" xlink:actuate="onLoad"/>
          <svg:desc>типы семье егэ обществознание</svg:desc>
        </draw:frame>
        <presentation:notes draw:style-name="a1070">
          <draw:frame draw:id="id154" draw:style-name="a1067" draw:name="Номер слайда 6" svg:x="4.67953in" svg:y="11.10827in" svg:width="3.5878in" svg:height="0.5842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desc/>
          </draw:frame>
          <draw:page-thumbnail draw:page-number="6" svg:x="0.2378in" svg:y="0.88898in" svg:width="7.79173in" svg:height="4.38386in" presentation:class="page" draw:id="id155" presentation:style-name="a1068" draw:name="Образ слайда 1">
            <svg:desc/>
          </draw:page-thumbnail>
          <draw:frame draw:id="id156" presentation:style-name="a1069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8" draw:style-name="a1071" draw:master-page-name="Master2-Layout7-blank-Пустой-слайд" presentation:presentation-page-layout-name="Master2-PPL7">
        <draw:frame draw:id="id157" presentation:style-name="a1078" draw:name="PlaceHolder 1" svg:x="1.5in" svg:y="0.3752in" svg:width="10.49921in" svg:height="1.62441in" presentation:class="title" presentation:placeholder="false">
          <draw:text-box>
            <text:p text:style-name="a1077" text:class-names="" text:cond-style-name=""><text:span text:style-name="a1072" text:class-names="">В социологии семья является социальным институтом:<text:line-break/><text:line-break/>для него свойственно наличие ценностей, <text:line-break/><text:line-break/>норм, <text:line-break/><text:line-break/>социальных установок, <text:line-break/>механизма регулирования системы поощрений и наказаний между членами семьи<text:line-break/><text:line-break/></text:span><text:span text:style-name="a1073" text:class-names="">Социа́льный</text:span><text:span text:style-name="a1074" text:class-names="">, или </text:span><text:span text:style-name="a1075" text:class-names="">обще́ственный институ́т</text:span><text:span text:style-name="a1076" text:class-names=""> — система взаимосвязанных норм, которые опираются на коллективно разделяемые ценности</text:span></text:p>
          </draw:text-box>
          <svg:desc/>
        </draw:frame>
        <presentation:notes draw:style-name="a1084">
          <draw:frame draw:id="id158" draw:style-name="a1081" draw:name="Номер слайда 6" svg:x="4.67953in" svg:y="11.10827in" svg:width="3.5878in" svg:height="0.58425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desc/>
          </draw:frame>
          <draw:page-thumbnail draw:page-number="7" svg:x="0.2378in" svg:y="0.88898in" svg:width="7.79173in" svg:height="4.38386in" presentation:class="page" draw:id="id159" presentation:style-name="a1082" draw:name="Образ слайда 1">
            <svg:desc/>
          </draw:page-thumbnail>
          <draw:frame draw:id="id160" presentation:style-name="a1083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9" draw:style-name="a1085" draw:master-page-name="Master2-Layout7-blank-Пустой-слайд" presentation:presentation-page-layout-name="Master2-PPL7">
        <draw:frame draw:id="id161" presentation:style-name="a1088" draw:name="PlaceHolder 1" svg:x="1.5in" svg:y="0.75in" svg:width="10.49921in" svg:height="1.62441in" presentation:class="title" presentation:placeholder="false">
          <draw:text-box>
            <text:p text:style-name="a1087" text:class-names="" text:cond-style-name=""><text:span text:style-name="a1086" text:class-names="">В науке насчитывается несколько классификаций семейных ценностей, которые вытекают из определения семьи. Их можно разделить по элементам связи внутри семьи, а также по функциям, которые они выполняют в институте семьи.</text:span></text:p>
          </draw:text-box>
          <svg:desc/>
        </draw:frame>
        <draw:frame draw:id="id162" presentation:style-name="a1122" draw:name="PlaceHolder 2" svg:x="1.5in" svg:y="2.5in" svg:width="10.49921in" svg:height="3.91575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Виды ценностей по элементам связи внутри семьи: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1. Ценность брака.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Брак - это форма отношений между мужчиной и женщиной, которая определяет их права и обязанности по отношению друг к другу. Можно выделить две составляющие ценности брака: ценность зарегистрированного брака и ценность гражданского брака (сожительства).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8" text:class-names="">2. Ценность<text:s text:c="1"/></text:span><text:span text:style-name="a1099" text:class-names="">родительства</text:span><text:span text:style-name="a1100" text:class-names="">.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3" text:class-names="">Ценность<text:s text:c="1"/></text:span><text:span text:style-name="a1104" text:class-names="">родительства</text:span><text:span text:style-name="a1105" text:class-names=""> заключается в полноценном воспитании детей. Именно родитель на протяжении всей жизни является значимой фигурой подражания ребенка. Ценность детей - это степень проявления доброжелательного отношения общества, семьи и индивида к детям. Из поколения в поколение передаются духовно-нравственные качества (верность, уважение, справедливость и др.)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3. Ценности, связанные с родством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Ценность наличия родственников, бережное отношение и взаимопомощь между членами семьи</text:span><text:span text:style-name="a1112" text:class-names="">.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4. Близкородственные браки – ценность сохранения собственности, наследства, статуса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desc/>
        </draw:frame>
        <presentation:notes draw:style-name="a1128">
          <draw:frame draw:id="id163" draw:style-name="a1125" draw:name="Номер слайда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desc/>
          </draw:frame>
          <draw:page-thumbnail draw:page-number="8" svg:x="0.23785in" svg:y="0.88889in" svg:width="7.79167in" svg:height="4.38368in" presentation:class="page" draw:id="id164" presentation:style-name="a1126" draw:name="Образ слайда 1">
            <svg:desc/>
          </draw:page-thumbnail>
          <draw:frame draw:id="id165" presentation:style-name="a1127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1" draw:style-name="a1129" draw:master-page-name="Master2-Layout7-blank-Пустой-слайд" presentation:presentation-page-layout-name="Master2-PPL7">
        <draw:frame draw:id="id166" presentation:style-name="a1130" draw:name="Заголовок 1" svg:x="0.66654in" svg:y="0.29921in" svg:width="11.99961in" svg:height="1.25197in" presentation:class="title" presentation:placeholder="true">
          <draw:text-box/>
          <svg:desc/>
        </draw:frame>
        <draw:frame draw:id="id167" presentation:style-name="a1131" draw:name="Текст 2" svg:x="0.66654in" svg:y="1.75472in" svg:width="11.99961in" svg:height="4.94961in" presentation:class="outline" presentation:placeholder="true">
          <draw:text-box/>
          <svg:desc/>
        </draw:frame>
      </draw:page>
      <draw:page draw:name="Slide10" draw:style-name="a1132" draw:master-page-name="Master2-Layout7-blank-Пустой-слайд" presentation:presentation-page-layout-name="Master2-PPL7">
        <draw:frame draw:id="id168" presentation:style-name="a1135" draw:name="PlaceHolder 1" svg:x="1.5in" svg:y="0.75in" svg:width="10.49921in" svg:height="1.62441in" presentation:class="title" presentation:placeholder="false">
          <draw:text-box>
            <text:p text:style-name="a1134" text:class-names="" text:cond-style-name=""><text:span text:style-name="a1133" text:class-names="">Семьи с позиции ценностных ориентиров подразделяются на следующие:<text:line-break/></text:span></text:p>
          </draw:text-box>
          <svg:desc/>
        </draw:frame>
        <draw:frame draw:id="id169" presentation:style-name="a1151" draw:name="PlaceHolder 2" svg:x="1.5in" svg:y="2.5in" svg:width="10.49921in" svg:height="3.91575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1. Приоритет напрямую отдается семейным ценностям;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2. Собственные ценностные ориентиры супругов, стоят выше семейных ценностей;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3. Предпочтение одного из супругов отдается личным ценностям, а другого -семейным;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4. Уравновешенность между личными и семейными ценностями;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5. Преобладают «плавающие» ценности (т. е. семейные ценности заменяются личными в определенные периоды и наоборот).</text:span></text:p>
              </text:list-item>
            </text:list>
          </draw:text-box>
          <svg:desc/>
        </draw:frame>
        <presentation:notes draw:style-name="a1157">
          <draw:frame draw:id="id170" draw:style-name="a1154" draw:name="Номер слайда 6" svg:x="4.67953in" svg:y="11.10827in" svg:width="3.5878in" svg:height="0.58425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desc/>
          </draw:frame>
          <draw:page-thumbnail draw:page-number="10" svg:x="0.2378in" svg:y="0.88898in" svg:width="7.79173in" svg:height="4.38386in" presentation:class="page" draw:id="id171" presentation:style-name="a1155" draw:name="Образ слайда 1">
            <svg:desc/>
          </draw:page-thumbnail>
          <draw:frame draw:id="id172" presentation:style-name="a1156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1" draw:style-name="a1158" draw:master-page-name="Master2-Layout1-title-Титульный-слайд" presentation:presentation-page-layout-name="Master2-PPL1">
        <draw:frame draw:id="id173" presentation:style-name="a1161" draw:name="Заголовок 1" svg:x="1.66654in" svg:y="1.22756in" svg:width="10in" svg:height="2.61102in" presentation:class="title" presentation:placeholder="false">
          <draw:text-box>
            <text:p text:style-name="a1160" text:class-names="" text:cond-style-name=""><text:span text:style-name="a1159" text:class-names="">Подходы к анализу семьи</text:span></text:p>
          </draw:text-box>
          <svg:desc/>
        </draw:frame>
        <draw:frame draw:id="id174" presentation:style-name="a1162" draw:name="Подзаголовок 2" svg:x="1.66654in" svg:y="3.93937in" svg:width="10in" svg:height="1.81063in" presentation:class="subtitle" presentation:placeholder="true">
          <draw:text-box/>
          <svg:desc/>
        </draw:frame>
        <presentation:notes draw:style-name="a1165">
          <draw:page-thumbnail draw:page-number="11" svg:x="1.21063in" svg:y="0.88858in" svg:width="5.84567in" svg:height="4.38425in" presentation:class="page" draw:id="id175" presentation:style-name="a1163" draw:name="Образ слайда 1">
            <svg:desc/>
          </draw:page-thumbnail>
          <draw:frame draw:id="id176" presentation:style-name="a1164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2" draw:style-name="a1166" draw:master-page-name="Master2-Layout7-blank-Пустой-слайд" presentation:presentation-page-layout-name="Master2-PPL7">
        <draw:frame draw:id="id177" presentation:style-name="a1170" draw:name="PlaceHolder 1" svg:x="1.70157in" svg:y="0.3937in" svg:width="10.49921in" svg:height="0.74606in" presentation:class="title" presentation:placeholder="false">
          <draw:text-box>
            <text:p text:style-name="a1169" text:class-names="" text:cond-style-name=""><text:span text:style-name="a1167" text:class-names="">Функционалистский</text:span><text:span text:style-name="a1168" text:class-names=""> подход</text:span></text:p>
          </draw:text-box>
          <svg:desc/>
        </draw:frame>
        <draw:frame draw:id="id178" presentation:style-name="a1184" draw:name="PlaceHolder 2" svg:x="1.57008in" svg:y="1.63464in" svg:width="11.25984in" svg:height="3.91575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1" text:class-names="">Этот подход еще называют<text:s text:c="1"/></text:span><text:span text:style-name="a1172" text:class-names="">производственным</text:span><text:span text:style-name="a1173" text:class-names="">, так как в нем доминирует анализ семьи и<text:s text:c="1"/></text:span><text:span text:style-name="a1174" text:class-names="">брака как институтов производства и воспроизводства общества</text:span><text:span text:style-name="a1175" text:class-names="">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функционализм сосредоточивает внимание на потребностях групповой жизни и на тех структурных построениях, посредством которых происходит удовлетворение таких потребностей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Однако критики функционализма указывают, что эти задачи могут решаться иными путями. Действительно, в результате социальных изменений многие экономические функции, функции ухода за детьми, их воспитания и обучения перешли от семьи к другим общественным институтам. </text:span></text:p>
              </text:list-item>
            </text:list>
          </draw:text-box>
          <svg:desc/>
        </draw:frame>
        <presentation:notes draw:style-name="a1190">
          <draw:frame draw:id="id179" draw:style-name="a1187" draw:name="Номер слайда 6" svg:x="4.67953in" svg:y="11.10827in" svg:width="3.5878in" svg:height="0.58425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desc/>
          </draw:frame>
          <draw:page-thumbnail draw:page-number="12" svg:x="0.2378in" svg:y="0.88898in" svg:width="7.79173in" svg:height="4.38386in" presentation:class="page" draw:id="id180" presentation:style-name="a1188" draw:name="Образ слайда 1">
            <svg:desc/>
          </draw:page-thumbnail>
          <draw:frame draw:id="id181" presentation:style-name="a1189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3" draw:style-name="a1191" draw:master-page-name="Master2-Layout7-blank-Пустой-слайд" presentation:presentation-page-layout-name="Master2-PPL7">
        <draw:frame draw:id="id182" presentation:style-name="a1194" draw:name="PlaceHolder 1" svg:x="1.5in" svg:y="0.75in" svg:width="10.49921in" svg:height="1.62441in" presentation:class="title" presentation:placeholder="false">
          <draw:text-box>
            <text:p text:style-name="a1193" text:class-names="" text:cond-style-name=""><text:span text:style-name="a1192" text:class-names="">Эволюционистский подход</text:span></text:p>
          </draw:text-box>
          <svg:desc/>
        </draw:frame>
        <draw:frame draw:id="id183" draw:style-name="a1205" draw:name="TextBox 3" svg:x="1.33425in" svg:y="1.57913in" svg:width="11.3752in" svg:height="4.90039in">
          <draw:text-box>
            <text:p text:style-name="a1196" text:class-names="" text:cond-style-name=""><text:span text:style-name="a1195" text:class-names="">Рассматривает «кризис» семейного института как естественный процесс</text:span></text:p>
            <text:p text:style-name="a1198" text:class-names="" text:cond-style-name=""><text:span text:style-name="a1197" text:class-names=""/></text:p>
            <text:p text:style-name="a1200" text:class-names="" text:cond-style-name=""><text:span text:style-name="a1199" text:class-names="">Выход функций брака за его границы: половая жизнь, выращивание детей, ведение быта, поиск ресурсов и поддержка могут быть найдены вне брачно-семейной структуры.</text:span></text:p>
            <text:p text:style-name="a1202" text:class-names="" text:cond-style-name=""><text:span text:style-name="a1201" text:class-names=""/></text:p>
            <text:p text:style-name="a1204" text:class-names="" text:cond-style-name=""><text:span text:style-name="a1203" text:class-names="">Выделяется первичное значение супружеских отношений в браке – качество отношений между супругами, снижается значение родительства и понимания необходимости обоих родителей для тебенка.</text:span></text:p>
          </draw:text-box>
          <svg:desc/>
        </draw:frame>
        <presentation:notes draw:style-name="a1211">
          <draw:frame draw:id="id184" draw:style-name="a1208" draw:name="Номер слайда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desc/>
          </draw:frame>
          <draw:page-thumbnail draw:page-number="13" svg:x="0.2378in" svg:y="0.88898in" svg:width="7.79173in" svg:height="4.38386in" presentation:class="page" draw:id="id185" presentation:style-name="a1209" draw:name="Образ слайда 1">
            <svg:desc/>
          </draw:page-thumbnail>
          <draw:frame draw:id="id186" presentation:style-name="a1210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4" draw:style-name="a1212" draw:master-page-name="Master2-Layout3-secHead-Заголовок-раздела" presentation:presentation-page-layout-name="Master2-PPL3">
        <draw:frame draw:id="id187" presentation:style-name="a1215" draw:name="PlaceHolder 1" svg:x="0.82835in" svg:y="0.36969in" svg:width="11.5in" svg:height="2.11102in" presentation:class="title" presentation:placeholder="false">
          <draw:text-box>
            <text:p text:style-name="a1214" text:class-names="" text:cond-style-name=""><text:span text:style-name="a1213" text:class-names="">Гендерный подход</text:span></text:p>
          </draw:text-box>
          <svg:desc/>
        </draw:frame>
        <draw:frame draw:id="id188" presentation:style-name="a1238" draw:name="Текст 2" svg:x="1.14882in" svg:y="1.65709in" svg:width="11.5in" svg:height="4.18622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Противоречия связанные с трансформацией гендерных ролей и патриархальным взглядом на семейные отношения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19" text:class-names="">Гендер -<text:s text:c="1"/></text:span><text:span text:style-name="a1220" text:class-names="">— спектр характеристик, относящихся к </text:span><text:span text:style-name="a1221" text:class-names=""><text:a xlink:href="https://ru.wikipedia.org/wiki/Маскулинность" text:style-name="" text:visited-style-name="">маскулинности</text:a></text:span><text:span text:style-name="a1222" text:class-names=""> и </text:span><text:span text:style-name="a1223" text:class-names=""><text:a xlink:href="https://ru.wikipedia.org/wiki/Фемининность" text:style-name="" text:visited-style-name="">фемининности</text:a></text:span><text:span text:style-name="a1224" text:class-names="">.</text:span><text:span text:style-name="a1225" text:class-names=""><text:s text:c="1"/></text:span><text:span text:style-name="a1226" text:class-names="">множественные различия между женщиной и мужчиной имеют и небиологические по своей природе причины. Понятие гендера затрагивает </text:span><text:span text:style-name="a1227" text:class-names=""><text:a xlink:href="https://ru.wikipedia.org/wiki/Психика" text:style-name="" text:visited-style-name="">психические</text:a></text:span><text:span text:style-name="a1228" text:class-names="">, культурные и социальные различия, а понятие пола — только физические (</text:span><text:span text:style-name="a1229" text:class-names=""><text:a xlink:href="https://ru.wikipedia.org/wiki/Анатомия" text:style-name="" text:visited-style-name="">анатомические</text:a></text:span><text:span text:style-name="a1230" text:class-names=""> и </text:span><text:span text:style-name="a1231" text:class-names=""><text:a xlink:href="https://ru.wikipedia.org/wiki/Физиология" text:style-name="" text:visited-style-name="">физиологические</text:a></text:span><text:span text:style-name="a1232" text:class-names="">) различия.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Активно исследует проблемы домашнего насилия, навязывания ролей, уникальности структуры отношений для каждой отдельной семьи, то есть отсутствие унификации.</text:span></text:p>
              </text:list-item>
            </text:list>
          </draw:text-box>
          <svg:desc/>
        </draw:frame>
        <presentation:notes draw:style-name="a1244">
          <draw:frame draw:id="id189" draw:style-name="a1241" draw:name="Номер слайда 6" svg:x="4.67953in" svg:y="11.10827in" svg:width="3.5878in" svg:height="0.58425in">
            <draw:text-box>
              <text:p text:style-name="a1240" text:class-names="" text:cond-style-name=""><text:span text:style-name="a1239" text:class-names=""><text:page-number style:num-format="1" text:fixed="false"/></text:span></text:p>
            </draw:text-box>
            <svg:desc/>
          </draw:frame>
          <draw:page-thumbnail draw:page-number="14" svg:x="0.2378in" svg:y="0.88898in" svg:width="7.79173in" svg:height="4.38386in" presentation:class="page" draw:id="id190" presentation:style-name="a1242" draw:name="Образ слайда 1">
            <svg:desc/>
          </draw:page-thumbnail>
          <draw:frame draw:id="id191" presentation:style-name="a1243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9" draw:style-name="a1245" draw:master-page-name="Master2-Layout2-obj-Заголовок-и-объект" presentation:presentation-page-layout-name="Master2-PPL2">
        <draw:frame draw:id="id192" presentation:style-name="a1248" draw:name="Заголовок 1" svg:x="0.66654in" svg:y="0.29921in" svg:width="11.99961in" svg:height="1.25197in" presentation:class="title" presentation:placeholder="false">
          <draw:text-box>
            <text:p text:style-name="a1247" text:class-names="" text:cond-style-name=""><text:span text:style-name="a1246" text:class-names="">Формы брачных союзов:</text:span></text:p>
          </draw:text-box>
          <svg:desc/>
        </draw:frame>
        <draw:frame draw:id="id193" presentation:style-name="a1277" draw:name="Объект 2" svg:x="1.12795in" svg:y="1.75472in" svg:width="11.53819in" svg:height="4.94961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Моногамия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Полигамия: полигиния (многоженство) и полиандрия (многомужество)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Серийная моногамия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Гостевой брак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Жизнь в<text:s text:c="1"/></text:span><text:span text:style-name="a1262" text:class-names="">коммуне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Какие еще?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desc/>
        </draw:frame>
        <presentation:notes draw:style-name="a1280">
          <draw:page-thumbnail draw:page-number="15" svg:x="0.23785in" svg:y="0.88889in" svg:width="7.78993in" svg:height="4.38368in" presentation:class="page" draw:id="id194" presentation:style-name="a1278" draw:name="Образ слайда 1">
            <svg:desc/>
          </draw:page-thumbnail>
          <draw:frame draw:id="id195" presentation:style-name="a1279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0" draw:style-name="a1281" draw:master-page-name="Master2-Layout2-obj-Заголовок-и-объект" presentation:presentation-page-layout-name="Master2-PPL2">
        <draw:frame draw:id="id196" presentation:style-name="a1285" draw:name="Заголовок 1" svg:x="0.66654in" svg:y="0.29921in" svg:width="11.99961in" svg:height="0.77332in" presentation:class="title" presentation:placeholder="false">
          <draw:text-box>
            <text:p text:style-name="a1284" text:class-names="" text:cond-style-name=""><text:span text:style-name="a1282" text:class-names="">Моногамные и полигамные браки в мире</text:span><text:span text:style-name="a1283" text:class-names=""/></text:p>
          </draw:text-box>
          <svg:desc/>
        </draw:frame>
        <draw:frame draw:id="id197" presentation:style-name="a1286" draw:name="Заголовок 2" svg:x="0.66654in" svg:y="1.75472in" svg:width="11.99961in" svg:height="4.94961in" presentation:class="title" presentation:placeholder="true">
          <draw:text-box/>
          <svg:desc/>
        </draw:frame>
        <draw:frame draw:id="id198" presentation:style-name="a1287" draw:name="Содержимое 3" svg:x="0.66654in" svg:y="1.75472in" svg:width="11.99961in" svg:height="4.94961in" presentation:class="outline" presentation:placeholder="true">
          <draw:text-box/>
          <svg:desc/>
        </draw:frame>
        <draw:frame draw:id="id199" draw:style-name="a1288" draw:name="Picture 2" svg:x="0.918in" svg:y="1.15129in" svg:width="11.96983in" svg:height="6.14452in" style:rel-width="scale" style:rel-height="scale">
          <draw:image xlink:href="media/image2.jpeg" xlink:type="simple" xlink:show="embed" xlink:actuate="onLoad"/>
          <svg:desc>В каких странах разрешено многоженство / © Canuckguy, BlankMap-World, Wikipedia </svg:desc>
        </draw:frame>
      </draw:page>
      <draw:page draw:name="Slide15" draw:style-name="a1289" draw:master-page-name="Master2-Layout1-title-Титульный-слайд" presentation:presentation-page-layout-name="Master2-PPL1">
        <draw:frame draw:id="id200" presentation:style-name="a1292" draw:name="Заголовок 1" svg:x="1.84724in" svg:y="0.56929in" svg:width="10in" svg:height="1.04173in" presentation:class="title" presentation:placeholder="false">
          <draw:text-box>
            <text:p text:style-name="a1291" text:class-names="" text:cond-style-name=""><text:span text:style-name="a1290" text:class-names="">Статистика РФ</text:span></text:p>
          </draw:text-box>
          <svg:desc/>
        </draw:frame>
        <draw:frame draw:id="id201" presentation:style-name="a1320" draw:name="Подзаголовок 2" svg:x="1.66654in" svg:y="1.90276in" svg:width="11.11102in" svg:height="3.84724in" presentation:class="subtitle" presentation:placeholder="false">
          <draw:text-box>
            <text:p text:style-name="a1297" text:class-names="" text:cond-style-name=""><text:span text:style-name="a1293" text:class-names="">По данным Росстата на октябрь 2024:<text:s text:c="1"/></text:span><text:span text:style-name="a1294" text:class-names=""> Браков: </text:span><text:span text:style-name="a1295" text:class-names="">764 722</text:span><text:span text:style-name="a1296" text:class-names="">. Прирост/снижение (г/г): -35 645. Разводов: 532 896.</text:span></text:p>
            <text:p text:style-name="a1299" text:class-names="" text:cond-style-name=""><text:span text:style-name="a1298" text:class-names="">8 из 10 браков распались</text:span></text:p>
            <text:p text:style-name="a1301" text:class-names="" text:cond-style-name=""><text:span text:style-name="a1300" text:class-names="">Рождаемость с прогнозом в абсолютных цифрах:</text:span></text:p>
            <text:list text:style-name="a1304">
              <text:list-item>
                <text:p text:style-name="a1303" text:class-names="" text:cond-style-name=""><text:span text:style-name="a1302" text:class-names="">2023 год — 1,245 млн человек (минимум с 1999 года, когда родились 1,215 млн);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2024 год — 1,172 млн человек (минимум с начала 1990-х);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2025 год — 1,153 млн человек;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2026 год — 1,143 млн человек.</text:span></text:p>
              </text:list-item>
            </text:list>
            <text:p text:style-name="a1315" text:class-names="" text:cond-style-name=""><text:span text:style-name="a1314" text:class-names=""/></text:p>
            <text:p text:style-name="a1317" text:class-names="" text:cond-style-name=""><text:span text:style-name="a1316" text:class-names=""/></text:p>
            <text:p text:style-name="a1319" text:class-names="" text:cond-style-name=""><text:span text:style-name="a1318" text:class-names=""/></text:p>
          </draw:text-box>
          <svg:desc/>
        </draw:frame>
        <presentation:notes draw:style-name="a1323">
          <draw:page-thumbnail draw:page-number="17" svg:x="1.21063in" svg:y="0.88858in" svg:width="5.84567in" svg:height="4.38425in" presentation:class="page" draw:id="id202" presentation:style-name="a1321" draw:name="Образ слайда 1">
            <svg:desc/>
          </draw:page-thumbnail>
          <draw:frame draw:id="id203" presentation:style-name="a1322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6" draw:style-name="a1324" draw:master-page-name="Master2-Layout1-title-Титульный-слайд" presentation:presentation-page-layout-name="Master2-PPL1">
        <draw:frame draw:id="id204" presentation:style-name="a1327" draw:name="Заголовок 1" svg:x="1.66654in" svg:y="1.22756in" svg:width="10in" svg:height="2.61102in" presentation:class="title" presentation:placeholder="false">
          <draw:text-box>
            <text:p text:style-name="a1326" text:class-names="" text:cond-style-name=""><text:span text:style-name="a1325" text:class-names="">Меры социальной поддержки семьи в Российской Федерации.</text:span></text:p>
          </draw:text-box>
          <svg:desc/>
        </draw:frame>
        <draw:frame draw:id="id205" presentation:style-name="a1328" draw:name="Подзаголовок 2" svg:x="1.66654in" svg:y="3.93937in" svg:width="10in" svg:height="1.81063in" presentation:class="subtitle" presentation:placeholder="true">
          <draw:text-box/>
          <svg:desc/>
        </draw:frame>
        <presentation:notes draw:style-name="a1331">
          <draw:page-thumbnail draw:page-number="18" svg:x="1.21063in" svg:y="0.88858in" svg:width="5.84567in" svg:height="4.38425in" presentation:class="page" draw:id="id206" presentation:style-name="a1329" draw:name="Образ слайда 1">
            <svg:desc/>
          </draw:page-thumbnail>
          <draw:frame draw:id="id207" presentation:style-name="a1330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7" draw:style-name="a1332" draw:master-page-name="Master2-Layout1-title-Титульный-слайд" presentation:presentation-page-layout-name="Master2-PPL1">
        <draw:frame draw:id="id208" presentation:style-name="a1335" draw:name="Заголовок 1" svg:x="1.66654in" svg:y="1.22756in" svg:width="10in" svg:height="1.07795in" presentation:class="title" presentation:placeholder="false">
          <draw:text-box>
            <text:p text:style-name="a1334" text:class-names="" text:cond-style-name=""><text:span text:style-name="a1333" text:class-names="">Приоритет – рождение детей</text:span></text:p>
          </draw:text-box>
          <svg:desc/>
        </draw:frame>
        <draw:frame draw:id="id209" presentation:style-name="a1350" draw:name="Подзаголовок 3" svg:x="1.66654in" svg:y="2.69449in" svg:width="10in" svg:height="3.70827in" presentation:class="subtitle" presentation:placeholder="false">
          <draw:text-box>
            <text:p text:style-name="a1337" text:class-names="" text:cond-style-name=""><text:span text:style-name="a1336" text:class-names="">Пособия</text:span></text:p>
            <text:p text:style-name="a1339" text:class-names="" text:cond-style-name=""><text:span text:style-name="a1338" text:class-names="">Одноразовые выплаты и материнский капитал</text:span></text:p>
            <text:p text:style-name="a1341" text:class-names="" text:cond-style-name=""><text:span text:style-name="a1340" text:class-names="">Поддержка многодетных семей</text:span></text:p>
            <text:p text:style-name="a1343" text:class-names="" text:cond-style-name=""><text:span text:style-name="a1342" text:class-names="">Льготы</text:span></text:p>
            <text:p text:style-name="a1345" text:class-names="" text:cond-style-name=""><text:span text:style-name="a1344" text:class-names="">Ипотека (иногда)</text:span></text:p>
            <text:p text:style-name="a1347" text:class-names="" text:cond-style-name=""><text:span text:style-name="a1346" text:class-names="">Удорожание разводов</text:span></text:p>
            <text:p text:style-name="a1349" text:class-names="" text:cond-style-name=""><text:span text:style-name="a1348" text:class-names="">Ужесточение ограничительных мер для неплатильщиков алиментов</text:span></text:p>
          </draw:text-box>
          <svg:desc/>
        </draw:frame>
        <presentation:notes draw:style-name="a1353">
          <draw:page-thumbnail draw:page-number="19" svg:x="1.21063in" svg:y="0.88858in" svg:width="5.84567in" svg:height="4.38425in" presentation:class="page" draw:id="id210" presentation:style-name="a1351" draw:name="Образ слайда 1">
            <svg:desc/>
          </draw:page-thumbnail>
          <draw:frame draw:id="id211" presentation:style-name="a1352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8" draw:style-name="a1354" draw:master-page-name="Master2-Layout2-obj-Заголовок-и-объект" presentation:presentation-page-layout-name="Master2-PPL2">
        <draw:frame draw:id="id212" presentation:style-name="a1357" draw:name="Заголовок 1" svg:x="0.66654in" svg:y="0.29921in" svg:width="11.99961in" svg:height="1.25197in" presentation:class="title" presentation:placeholder="false">
          <draw:text-box>
            <text:p text:style-name="a1356" text:class-names="" text:cond-style-name=""><text:span text:style-name="a1355" text:class-names="">Викторина</text:span></text:p>
          </draw:text-box>
          <svg:desc/>
        </draw:frame>
        <draw:frame draw:id="id213" presentation:style-name="a1361" draw:name="Объект 2" svg:x="0.97677in" svg:y="1.75472in" svg:width="11.68937in" svg:height="4.94961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См. файл «Викторина Семья»</text:span></text:p>
              </text:list-item>
            </text:list>
          </draw:text-box>
          <svg:desc/>
        </draw:frame>
        <presentation:notes draw:style-name="a1364">
          <draw:page-thumbnail draw:page-number="20" svg:x="1.21063in" svg:y="0.88858in" svg:width="5.84567in" svg:height="4.38425in" presentation:class="page" draw:id="id214" presentation:style-name="a1362" draw:name="Образ слайда 1">
            <svg:desc/>
          </draw:page-thumbnail>
          <draw:frame draw:id="id215" presentation:style-name="a1363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</style:presentation-page-layout>
    <style:presentation-page-layout style:name="Master1-PPL2" style:display-name="Заголовок и объект">
      <presentation:placeholder presentation:object="title" svg:x="1.5in" svg:y="0.75in" svg:width="10.49921in" svg:height="1.62441in"/>
      <presentation:placeholder presentation:object="title" svg:x="0.66654in" svg:y="1.75472in" svg:width="11.99961in" svg:height="4.94961in"/>
    </style:presentation-page-layout>
    <style:presentation-page-layout style:name="Master1-PPL3" style:display-name="Заголовок раздела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</style:presentation-page-layout>
    <style:presentation-page-layout style:name="Master1-PPL4" style:display-name="Два объекта">
      <presentation:placeholder presentation:object="title" svg:x="1.5in" svg:y="0.75in" svg:width="10.49921in" svg:height="1.62441in"/>
      <presentation:placeholder presentation:object="title" svg:x="0.66654in" svg:y="1.75512in" svg:width="5.91653in" svg:height="4.94961in"/>
      <presentation:placeholder presentation:object="title" svg:x="6.75in" svg:y="1.75512in" svg:width="5.91653in" svg:height="4.94961in"/>
    </style:presentation-page-layout>
    <style:presentation-page-layout style:name="Master1-PPL5" style:display-name="Сравнение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</style:presentation-page-layout>
    <style:presentation-page-layout style:name="Master1-PPL6" style:display-name="Только заголовок">
      <presentation:placeholder presentation:object="title" svg:x="1.5in" svg:y="0.75in" svg:width="10.49921in" svg:height="1.62441in"/>
    </style:presentation-page-layout>
    <style:presentation-page-layout style:name="Master1-PPL7" style:display-name="Пустой слайд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94961in"/>
    </style:presentation-page-layout>
    <style:presentation-page-layout style:name="Master1-PPL8" style:display-name="Объект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</style:presentation-page-layout>
    <style:presentation-page-layout style:name="Master1-PPL9" style:display-name="Рисунок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</style:presentation-page-layout>
    <style:presentation-page-layout style:name="Master1-PPL10" style:display-name="Заголовок и вертикальный текст">
      <presentation:placeholder presentation:object="title" svg:x="1.5in" svg:y="0.75in" svg:width="10.49921in" svg:height="1.62441in"/>
      <presentation:placeholder presentation:object="outline" svg:x="0.66654in" svg:y="1.75472in" svg:width="11.99961in" svg:height="4.94961in"/>
    </style:presentation-page-layout>
    <style:presentation-page-layout style:name="Master1-PPL11" style:display-name="Вертикальный заголовок и текст">
      <presentation:placeholder presentation:object="title" svg:x="9.66654in" svg:y="0.75in" svg:width="3in" svg:height="5.95472in"/>
      <presentation:placeholder presentation:object="outline" svg:x="0.66654in" svg:y="0.75in" svg:width="8.83346in" svg:height="5.95472in"/>
    </style:presentation-page-layout>
    <style:presentation-page-layout style:name="Master2-PPL1" style:display-name="Титульный слайд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outline" svg:x="0.66654in" svg:y="1.75472in" svg:width="11.99961in" svg:height="4.94961in"/>
    </style:presentation-page-layout>
    <style:presentation-page-layout style:name="Master2-PPL2" style:display-name="Заголовок и объект">
      <presentation:placeholder presentation:object="title" svg:x="0.66654in" svg:y="0.29921in" svg:width="11.99961in" svg:height="1.25197in"/>
      <presentation:placeholder presentation:object="title" svg:x="0.66654in" svg:y="1.75472in" svg:width="11.99961in" svg:height="4.94961in"/>
      <presentation:placeholder presentation:object="object" svg:x="0.66654in" svg:y="1.75472in" svg:width="11.99961in" svg:height="4.94961in"/>
    </style:presentation-page-layout>
    <style:presentation-page-layout style:name="Master2-PPL3" style:display-name="Заголовок раздела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</style:presentation-page-layout>
    <style:presentation-page-layout style:name="Master2-PPL4" style:display-name="Два объекта">
      <presentation:placeholder presentation:object="title" svg:x="0.66654in" svg:y="0.29921in" svg:width="11.99961in" svg:height="1.25197in"/>
      <presentation:placeholder presentation:object="title" svg:x="0.66654in" svg:y="1.75512in" svg:width="5.91653in" svg:height="4.94961in"/>
      <presentation:placeholder presentation:object="title" svg:x="6.75in" svg:y="1.75512in" svg:width="5.91653in" svg:height="4.94961in"/>
    </style:presentation-page-layout>
    <style:presentation-page-layout style:name="Master2-PPL5" style:display-name="Сравнение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</style:presentation-page-layout>
    <style:presentation-page-layout style:name="Master2-PPL6" style:display-name="Только заголовок">
      <presentation:placeholder presentation:object="title" svg:x="0.66654in" svg:y="0.29921in" svg:width="11.99961in" svg:height="1.25197in"/>
    </style:presentation-page-layout>
    <style:presentation-page-layout style:name="Master2-PPL7" style:display-name="Пустой слайд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94961in"/>
    </style:presentation-page-layout>
    <style:presentation-page-layout style:name="Master2-PPL8" style:display-name="Объект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</style:presentation-page-layout>
    <style:presentation-page-layout style:name="Master2-PPL9" style:display-name="Рисунок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</style:presentation-page-layout>
    <style:presentation-page-layout style:name="Master2-PPL10" style:display-name="Заголовок и вертикальный текст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94961in"/>
    </style:presentation-page-layout>
    <style:presentation-page-layout style:name="Master2-PPL11" style:display-name="Вертикальный заголовок и текст">
      <presentation:placeholder presentation:object="title" svg:x="9.66654in" svg:y="0.29843in" svg:width="3in" svg:height="6.4063in"/>
      <presentation:placeholder presentation:object="outline" svg:x="0.66654in" svg:y="0.29843in" svg:width="8.83346in" svg:height="6.406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draw:fill="none" draw:stroke="non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9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65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12">
      <style:graphic-properties draw:fill="none" draw:stroke="none"/>
    </style:style>
    <style:style style:family="paragraph" style:name="a859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none" draw:stroke="non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59">
      <style:graphic-properties draw:fill="none" draw:stroke="none"/>
    </style:style>
    <style:style style:family="presentation" style:name="a500">
      <style:graphic-properties draw:fill="none" draw:stroke="non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5">
      <style:graphic-properties draw:fill="none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4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21">
      <style:graphic-properties draw:fill="none" draw:stroke="non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4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2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2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5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6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6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custom-shape svg:x="0.52283in" svg:y="0.00039in" svg:width="0.24921in" svg:height="7.49921in" draw:id="id0" draw:style-name="a3" draw:name="Rectangle 8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">
        <svg:desc/>
        <draw:custom-shape svg:x="8.91496in" svg:y="1.8437in" svg:width="3.58071in" svg:height="4.82008in" draw:id="id4" draw:style-name="a26" draw:name="Freeform 6"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5" draw:style-name="a29" draw:name="Freeform 6">
          <svg:desc/>
          <text:p text:style-name="a28" text:class-names="" text:cond-style-name=""><text:span text:style-name="a2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" presentation:style-name="a7" draw:name="PlaceHolder 1" svg:x="1.5in" svg:y="0.75in" svg:width="10.49921in" svg:height="1.62441in" presentation:class="title" presentation:placeholder="false">
        <draw:text-box>
          <text:list text:style-name="a6">
            <text:list-item>
              <text:p text:style-name="a5" text:class-names="" text:cond-style-name=""><text:span text:style-name="a4" text:class-names="">Для правки текста заголовка щелкните мышью</text:span></text:p>
            </text:list-item>
          </text:list>
        </draw:text-box>
        <svg:desc/>
      </draw:frame>
      <draw:frame draw:id="id3" presentation:style-name="a23" draw:name="Текст 6" svg:x="0.66654in" svg:y="1.75472in" svg:width="11.99961in" svg:height="4.9496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6">
        <draw:page-thumbnail svg:x="1.21063in" svg:y="0.88858in" svg:width="5.84567in" svg:height="4.38425in" presentation:class="page" draw:id="id6" presentation:style-name="a30" draw:name="Образ слайда 1">
          <svg:desc/>
        </draw:page-thumbnail>
        <draw:frame draw:id="id7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desc/>
        </draw:frame>
        <draw:frame draw:id="id8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9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desc/>
        </draw:frame>
        <draw:frame draw:id="id10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11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Титульный-слайд" style:page-layout-name="pageLayout1" draw:style-name="a47">
      <draw:custom-shape svg:x="0.52283in" svg:y="0.00039in" svg:width="0.24921in" svg:height="7.49921in" draw:id="id12" draw:layer="Master1-bg" draw:style-name="a50" draw:name="Rectangle 8"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3">
        <svg:desc/>
        <draw:custom-shape svg:x="8.91496in" svg:y="1.8437in" svg:width="3.58071in" svg:height="4.82008in" draw:id="id16" draw:layer="Master1-bg" draw:style-name="a61" draw:name="Freeform 6"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17" draw:layer="Master1-bg" draw:style-name="a64" draw:name="Freeform 6"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14" presentation:style-name="a54" draw:name="Заголовок 1" svg:x="1.66654in" svg:y="1.22756in" svg:width="10in" svg:height="2.61102in" presentation:class="title" presentation:placeholder="false">
        <draw:text-box>
          <text:list text:style-name="a53">
            <text:list-item>
              <text:p text:style-name="a52" text:class-names="" text:cond-style-name=""><text:span text:style-name="a51" text:class-names="">Образец заголовка</text:span></text:p>
            </text:list-item>
          </text:list>
        </draw:text-box>
        <svg:desc/>
      </draw:frame>
      <draw:frame draw:id="id15" presentation:style-name="a58" draw:name="Подзаголовок 2" svg:x="1.66654in" svg:y="3.93937in" svg:width="10in" svg:height="1.81063in" presentation:class="subtitle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подзаголовка</text:span></text:p>
            </text:list-item>
          </text:list>
        </draw:text-box>
        <svg:desc/>
      </draw:frame>
      <presentation:notes style:page-layout-name="pageLayout2" draw:style-name="a81">
        <draw:page-thumbnail svg:x="1.21063in" svg:y="0.88858in" svg:width="5.84567in" svg:height="4.38425in" presentation:class="page" draw:id="id6" presentation:style-name="a65" draw:name="Образ слайда 1">
          <svg:desc/>
        </draw:page-thumbnail>
        <draw:frame draw:id="id7" presentation:style-name="a68" draw:name="Заметки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desc/>
        </draw:frame>
        <draw:frame draw:id="id8" presentation:style-name="a71" draw:name="Верхний колонтитул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9" presentation:style-name="a74" draw:name="Дата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10" presentation:style-name="a77" draw:name="Нижний колонтитул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11" presentation:style-name="a80" draw:name="Номер слайда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82">
      <draw:custom-shape svg:x="0.52283in" svg:y="0.00039in" svg:width="0.24921in" svg:height="7.49921in" draw:id="id18" draw:layer="Master1-bg" draw:style-name="a85" draw:name="Rectangle 8"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9">
        <svg:desc/>
        <draw:custom-shape svg:x="8.91496in" svg:y="1.8437in" svg:width="3.58071in" svg:height="4.82008in" draw:id="id22" draw:layer="Master1-bg" draw:style-name="a96" draw:name="Freeform 6"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23" draw:layer="Master1-bg" draw:style-name="a99" draw:name="Freeform 6"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0" presentation:style-name="a89" draw:name="Заголовок 1" svg:x="1.5in" svg:y="0.75in" svg:width="10.49921in" svg:height="1.62441in" presentation:class="title" presentation:placeholder="false">
        <draw:text-box>
          <text:list text:style-name="a88">
            <text:list-item>
              <text:p text:style-name="a87" text:class-names="" text:cond-style-name=""><text:span text:style-name="a86" text:class-names="">Образец заголовка</text:span></text:p>
            </text:list-item>
          </text:list>
        </draw:text-box>
        <svg:desc/>
      </draw:frame>
      <draw:frame draw:id="id21" presentation:style-name="a93" draw:name="Объект 2" svg:x="0.66654in" svg:y="1.75472in" svg:width="11.99961in" svg:height="4.94961in" presentation:class="title" presentation:placeholder="false">
        <draw:text-box>
          <text:list text:style-name="a92">
            <text:list-item>
              <text:p text:style-name="a91" text:class-names="" text:cond-style-name=""><text:span text:style-name="a90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presentation:notes style:page-layout-name="pageLayout2" draw:style-name="a116">
        <draw:page-thumbnail svg:x="1.21063in" svg:y="0.88858in" svg:width="5.84567in" svg:height="4.38425in" presentation:class="page" draw:id="id6" presentation:style-name="a100" draw:name="Образ слайда 1">
          <svg:desc/>
        </draw:page-thumbnail>
        <draw:frame draw:id="id7" presentation:style-name="a103" draw:name="Заметки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desc/>
        </draw:frame>
        <draw:frame draw:id="id8" presentation:style-name="a106" draw:name="Верхний колонтитул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desc/>
        </draw:frame>
        <draw:frame draw:id="id9" presentation:style-name="a109" draw:name="Дата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desc/>
        </draw:frame>
        <draw:frame draw:id="id10" presentation:style-name="a112" draw:name="Нижний колонтитул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1" presentation:style-name="a115" draw:name="Номер слайда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117">
      <draw:custom-shape svg:x="0.52283in" svg:y="0.00039in" svg:width="0.24921in" svg:height="7.49921in" draw:id="id24" draw:layer="Master1-bg" draw:style-name="a120" draw:name="Rectangle 8"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25">
        <svg:desc/>
        <draw:custom-shape svg:x="8.91496in" svg:y="1.8437in" svg:width="3.58071in" svg:height="4.82008in" draw:id="id28" draw:layer="Master1-bg" draw:style-name="a131" draw:name="Freeform 6"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29" draw:layer="Master1-bg" draw:style-name="a134" draw:name="Freeform 6">
          <svg:desc/>
          <text:p text:style-name="a133" text:class-names="" text:cond-style-name=""><text:span text:style-name="a132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6" presentation:style-name="a124" draw:name="Заголовок 1" svg:x="0.90984in" svg:y="1.86969in" svg:width="11.5in" svg:height="3.11969in" presentation:class="title" presentation:placeholder="false">
        <draw:text-box>
          <text:list text:style-name="a123">
            <text:list-item>
              <text:p text:style-name="a122" text:class-names="" text:cond-style-name=""><text:span text:style-name="a121" text:class-names="">Образец заголовка</text:span></text:p>
            </text:list-item>
          </text:list>
        </draw:text-box>
        <svg:desc/>
      </draw:frame>
      <draw:frame draw:id="id27" presentation:style-name="a128" draw:name="Текст 2" svg:x="0.90984in" svg:y="5.01929in" svg:width="11.5in" svg:height="1.64055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Образец текста</text:span></text:p>
            </text:list-item>
          </text:list>
        </draw:text-box>
        <svg:desc/>
      </draw:frame>
      <presentation:notes style:page-layout-name="pageLayout2" draw:style-name="a151">
        <draw:page-thumbnail svg:x="1.21063in" svg:y="0.88858in" svg:width="5.84567in" svg:height="4.38425in" presentation:class="page" draw:id="id6" presentation:style-name="a135" draw:name="Образ слайда 1">
          <svg:desc/>
        </draw:page-thumbnail>
        <draw:frame draw:id="id7" presentation:style-name="a138" draw:name="Заметки 2" svg:x="0.82677in" svg:y="5.55394in" svg:width="6.61378in" svg:height="5.26142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desc/>
        </draw:frame>
        <draw:frame draw:id="id8" presentation:style-name="a141" draw:name="Верхний колонтитул 3" svg:x="0in" svg:y="0in" svg:width="3.5878in" svg:height="0.5842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desc/>
        </draw:frame>
        <draw:frame draw:id="id9" presentation:style-name="a144" draw:name="Дата 4" svg:x="4.67953in" svg:y="0in" svg:width="3.5878in" svg:height="0.5842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desc/>
        </draw:frame>
        <draw:frame draw:id="id10" presentation:style-name="a147" draw:name="Нижний колонтитул 5" svg:x="0in" svg:y="11.10827in" svg:width="3.5878in" svg:height="0.5842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desc/>
        </draw:frame>
        <draw:frame draw:id="id11" presentation:style-name="a150" draw:name="Номер слайда 6" svg:x="4.67953in" svg:y="11.10827in" svg:width="3.5878in" svg:height="0.58425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Два-объекта" style:page-layout-name="pageLayout1" draw:style-name="a152">
      <draw:custom-shape svg:x="0.52283in" svg:y="0.00039in" svg:width="0.24921in" svg:height="7.49921in" draw:id="id30" draw:layer="Master1-bg" draw:style-name="a155" draw:name="Rectangle 8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31">
        <svg:desc/>
        <draw:custom-shape svg:x="8.91496in" svg:y="1.8437in" svg:width="3.58071in" svg:height="4.82008in" draw:id="id35" draw:layer="Master1-bg" draw:style-name="a170" draw:name="Freeform 6"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36" draw:layer="Master1-bg" draw:style-name="a173" draw:name="Freeform 6"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32" presentation:style-name="a159" draw:name="Заголовок 1" svg:x="1.5in" svg:y="0.75in" svg:width="10.49921in" svg:height="1.62441in" presentation:class="title" presentation:placeholder="false">
        <draw:text-box>
          <text:list text:style-name="a158">
            <text:list-item>
              <text:p text:style-name="a157" text:class-names="" text:cond-style-name=""><text:span text:style-name="a156" text:class-names="">Образец заголовка</text:span></text:p>
            </text:list-item>
          </text:list>
        </draw:text-box>
        <svg:desc/>
      </draw:frame>
      <draw:frame draw:id="id33" presentation:style-name="a163" draw:name="Объект 2" svg:x="0.66654in" svg:y="1.75512in" svg:width="5.91653in" svg:height="4.94961in" presentation:class="title" presentation:placeholder="false">
        <draw:text-box>
          <text:list text:style-name="a162">
            <text:list-item>
              <text:p text:style-name="a161" text:class-names="" text:cond-style-name=""><text:span text:style-name="a160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34" presentation:style-name="a167" draw:name="Объект 3" svg:x="6.75in" svg:y="1.75512in" svg:width="5.91653in" svg:height="4.94961in" presentation:class="title" presentation:placeholder="false">
        <draw:text-box>
          <text:list text:style-name="a166">
            <text:list-item>
              <text:p text:style-name="a165" text:class-names="" text:cond-style-name=""><text:span text:style-name="a164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presentation:notes style:page-layout-name="pageLayout2" draw:style-name="a190">
        <draw:page-thumbnail svg:x="1.21063in" svg:y="0.88858in" svg:width="5.84567in" svg:height="4.38425in" presentation:class="page" draw:id="id6" presentation:style-name="a174" draw:name="Образ слайда 1">
          <svg:desc/>
        </draw:page-thumbnail>
        <draw:frame draw:id="id7" presentation:style-name="a177" draw:name="Заметки 2" svg:x="0.82677in" svg:y="5.55394in" svg:width="6.61378in" svg:height="5.26142in" presentation:class="notes" presentation:placeholder="false">
          <draw:text-box>
            <text:p text:style-name="a176" text:class-names="" text:cond-style-name=""><text:span text:style-name="a175" text:class-names=""/></text:p>
          </draw:text-box>
          <svg:desc/>
        </draw:frame>
        <draw:frame draw:id="id8" presentation:style-name="a180" draw:name="Верхний колонтитул 3" svg:x="0in" svg:y="0in" svg:width="3.5878in" svg:height="0.5842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desc/>
        </draw:frame>
        <draw:frame draw:id="id9" presentation:style-name="a183" draw:name="Дата 4" svg:x="4.67953in" svg:y="0in" svg:width="3.5878in" svg:height="0.58425in" presentation:class="date-time" presentation:placeholder="false">
          <draw:text-box>
            <text:p text:style-name="a182" text:class-names="" text:cond-style-name=""><text:span text:style-name="a181" text:class-names=""/></text:p>
          </draw:text-box>
          <svg:desc/>
        </draw:frame>
        <draw:frame draw:id="id10" presentation:style-name="a186" draw:name="Нижний колонтитул 5" svg:x="0in" svg:y="11.10827in" svg:width="3.5878in" svg:height="0.58425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1" presentation:style-name="a189" draw:name="Номер слайда 6" svg:x="4.67953in" svg:y="11.10827in" svg:width="3.5878in" svg:height="0.58425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Сравнение" style:page-layout-name="pageLayout1" draw:style-name="a191">
      <draw:custom-shape svg:x="0.52283in" svg:y="0.00039in" svg:width="0.24921in" svg:height="7.49921in" draw:id="id37" draw:layer="Master1-bg" draw:style-name="a194" draw:name="Rectangle 8"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38">
        <svg:desc/>
        <draw:custom-shape svg:x="8.91496in" svg:y="1.8437in" svg:width="3.58071in" svg:height="4.82008in" draw:id="id44" draw:layer="Master1-bg" draw:style-name="a217" draw:name="Freeform 6"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45" draw:layer="Master1-bg" draw:style-name="a220" draw:name="Freeform 6"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39" presentation:style-name="a198" draw:name="Заголовок 1" svg:x="0.9185in" svg:y="0.39921in" svg:width="11.5in" svg:height="1.44961in" presentation:class="title" presentation:placeholder="false">
        <draw:text-box>
          <text:list text:style-name="a197">
            <text:list-item>
              <text:p text:style-name="a196" text:class-names="" text:cond-style-name=""><text:span text:style-name="a195" text:class-names="">Образец заголовка</text:span></text:p>
            </text:list-item>
          </text:list>
        </draw:text-box>
        <svg:desc/>
      </draw:frame>
      <draw:frame draw:id="id40" presentation:style-name="a202" draw:name="Текст 2" svg:x="0.9185in" svg:y="1.83858in" svg:width="5.64055in" svg:height="0.90118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Образец текста</text:span></text:p>
            </text:list-item>
          </text:list>
        </draw:text-box>
        <svg:desc/>
      </draw:frame>
      <draw:frame draw:id="id41" presentation:style-name="a206" draw:name="Объект 3" svg:x="0.9185in" svg:y="2.73976in" svg:width="5.64055in" svg:height="4.02953in" presentation:class="title" presentation:placeholder="false">
        <draw:text-box>
          <text:list text:style-name="a205">
            <text:list-item>
              <text:p text:style-name="a204" text:class-names="" text:cond-style-name=""><text:span text:style-name="a203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42" presentation:style-name="a210" draw:name="Текст 4" svg:x="6.75in" svg:y="1.83858in" svg:width="5.6685in" svg:height="0.901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Образец текста</text:span></text:p>
            </text:list-item>
          </text:list>
        </draw:text-box>
        <svg:desc/>
      </draw:frame>
      <draw:frame draw:id="id43" presentation:style-name="a214" draw:name="Объект 5" svg:x="6.75in" svg:y="2.73976in" svg:width="5.6685in" svg:height="4.02953in" presentation:class="title" presentation:placeholder="false">
        <draw:text-box>
          <text:list text:style-name="a213">
            <text:list-item>
              <text:p text:style-name="a212" text:class-names="" text:cond-style-name=""><text:span text:style-name="a211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Образ слайда 1">
          <svg:desc/>
        </draw:page-thumbnail>
        <draw:frame draw:id="id7" presentation:style-name="a224" draw:name="Заметки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desc/>
        </draw:frame>
        <draw:frame draw:id="id8" presentation:style-name="a227" draw:name="Верхний колонтитул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desc/>
        </draw:frame>
        <draw:frame draw:id="id9" presentation:style-name="a230" draw:name="Дата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desc/>
        </draw:frame>
        <draw:frame draw:id="id10" presentation:style-name="a233" draw:name="Нижний колонтитул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desc/>
        </draw:frame>
        <draw:frame draw:id="id11" presentation:style-name="a236" draw:name="Номер слайда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238">
      <draw:custom-shape svg:x="0.52283in" svg:y="0.00039in" svg:width="0.24921in" svg:height="7.49921in" draw:id="id46" draw:layer="Master1-bg" draw:style-name="a241" draw:name="Rectangle 8"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47">
        <svg:desc/>
        <draw:custom-shape svg:x="8.91496in" svg:y="1.8437in" svg:width="3.58071in" svg:height="4.82008in" draw:id="id49" draw:layer="Master1-bg" draw:style-name="a248" draw:name="Freeform 6">
          <svg:desc/>
          <text:p text:style-name="a247" text:class-names="" text:cond-style-name=""><text:span text:style-name="a246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50" draw:layer="Master1-bg" draw:style-name="a251" draw:name="Freeform 6">
          <svg:desc/>
          <text:p text:style-name="a250" text:class-names="" text:cond-style-name=""><text:span text:style-name="a249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48" presentation:style-name="a245" draw:name="Заголовок 1" svg:x="1.5in" svg:y="0.75in" svg:width="10.49921in" svg:height="1.62441in" presentation:class="title" presentation:placeholder="false">
        <draw:text-box>
          <text:list text:style-name="a244">
            <text:list-item>
              <text:p text:style-name="a243" text:class-names="" text:cond-style-name=""><text:span text:style-name="a242" text:class-names="">Образец заголовка</text:span></text:p>
            </text:list-item>
          </text:list>
        </draw:text-box>
        <svg:desc/>
      </draw:frame>
      <presentation:notes style:page-layout-name="pageLayout2" draw:style-name="a268">
        <draw:page-thumbnail svg:x="1.21063in" svg:y="0.88858in" svg:width="5.84567in" svg:height="4.38425in" presentation:class="page" draw:id="id6" presentation:style-name="a252" draw:name="Образ слайда 1">
          <svg:desc/>
        </draw:page-thumbnail>
        <draw:frame draw:id="id7" presentation:style-name="a255" draw:name="Заметки 2" svg:x="0.82677in" svg:y="5.55394in" svg:width="6.61378in" svg:height="5.26142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desc/>
        </draw:frame>
        <draw:frame draw:id="id8" presentation:style-name="a258" draw:name="Верхний колонтитул 3" svg:x="0in" svg:y="0in" svg:width="3.5878in" svg:height="0.5842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desc/>
        </draw:frame>
        <draw:frame draw:id="id9" presentation:style-name="a261" draw:name="Дата 4" svg:x="4.67953in" svg:y="0in" svg:width="3.5878in" svg:height="0.5842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desc/>
        </draw:frame>
        <draw:frame draw:id="id10" presentation:style-name="a264" draw:name="Нижний колонтитул 5" svg:x="0in" svg:y="11.10827in" svg:width="3.5878in" svg:height="0.5842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desc/>
        </draw:frame>
        <draw:frame draw:id="id11" presentation:style-name="a267" draw:name="Номер слайда 6" svg:x="4.67953in" svg:y="11.10827in" svg:width="3.5878in" svg:height="0.58425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Пустой-слайд" style:page-layout-name="pageLayout1" draw:style-name="a269">
      <draw:custom-shape svg:x="0.52283in" svg:y="0.00039in" svg:width="0.24921in" svg:height="7.49921in" draw:id="id51" draw:layer="Master1-bg" draw:style-name="a272" draw:name="Rectangle 8"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52">
        <svg:desc/>
        <draw:custom-shape svg:x="8.91496in" svg:y="1.8437in" svg:width="3.58071in" svg:height="4.82008in" draw:id="id55" draw:layer="Master1-bg" draw:style-name="a283" draw:name="Freeform 6"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56" draw:layer="Master1-bg" draw:style-name="a286" draw:name="Freeform 6"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53" presentation:style-name="a276" draw:name="Заголовок 1" svg:x="0.66654in" svg:y="0.29921in" svg:width="11.99961in" svg:height="1.25197in" presentation:class="titl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desc/>
      </draw:frame>
      <draw:frame draw:id="id54" presentation:style-name="a280" draw:name="Текст 2" svg:x="0.66654in" svg:y="1.75472in" svg:width="11.99961in" svg:height="4.9496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desc/>
      </draw:frame>
      <presentation:notes style:page-layout-name="pageLayout2" draw:style-name="a303">
        <draw:page-thumbnail svg:x="1.21063in" svg:y="0.88858in" svg:width="5.84567in" svg:height="4.38425in" presentation:class="page" draw:id="id6" presentation:style-name="a287" draw:name="Образ слайда 1">
          <svg:desc/>
        </draw:page-thumbnail>
        <draw:frame draw:id="id7" presentation:style-name="a290" draw:name="Заметки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desc/>
        </draw:frame>
        <draw:frame draw:id="id8" presentation:style-name="a293" draw:name="Верхний колонтитул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desc/>
        </draw:frame>
        <draw:frame draw:id="id9" presentation:style-name="a296" draw:name="Дата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desc/>
        </draw:frame>
        <draw:frame draw:id="id10" presentation:style-name="a299" draw:name="Нижний колонтитул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desc/>
        </draw:frame>
        <draw:frame draw:id="id11" presentation:style-name="a302" draw:name="Номер слайда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304">
      <draw:custom-shape svg:x="0.52283in" svg:y="0.00039in" svg:width="0.24921in" svg:height="7.49921in" draw:id="id57" draw:layer="Master1-bg" draw:style-name="a307" draw:name="Rectangle 8"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58">
        <svg:desc/>
        <draw:custom-shape svg:x="8.91496in" svg:y="1.8437in" svg:width="3.58071in" svg:height="4.82008in" draw:id="id62" draw:layer="Master1-bg" draw:style-name="a322" draw:name="Freeform 6"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63" draw:layer="Master1-bg" draw:style-name="a325" draw:name="Freeform 6"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59" presentation:style-name="a311" draw:name="Заголовок 1" svg:x="0.9185in" svg:y="0.5in" svg:width="4.30039in" svg:height="1.75in" presentation:class="title" presentation:placeholder="false">
        <draw:text-box>
          <text:list text:style-name="a310">
            <text:list-item>
              <text:p text:style-name="a309" text:class-names="" text:cond-style-name=""><text:span text:style-name="a308" text:class-names="">Образец заголовка</text:span></text:p>
            </text:list-item>
          </text:list>
        </draw:text-box>
        <svg:desc/>
      </draw:frame>
      <draw:frame draw:id="id60" presentation:style-name="a315" draw:name="Объект 2" svg:x="5.6685in" svg:y="1.07992in" svg:width="6.75in" svg:height="5.32992in" presentation:class="title" presentation:placeholder="false">
        <draw:text-box>
          <text:list text:style-name="a314">
            <text:list-item>
              <text:p text:style-name="a313" text:class-names="" text:cond-style-name=""><text:span text:style-name="a312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61" presentation:style-name="a319" draw:name="Текст 3" svg:x="0.9185in" svg:y="2.25in" svg:width="4.30039in" svg:height="4.1685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Образец текста</text:span></text:p>
            </text:list-item>
          </text:list>
        </draw:text-box>
        <svg:desc/>
      </draw:frame>
      <presentation:notes style:page-layout-name="pageLayout2" draw:style-name="a342">
        <draw:page-thumbnail svg:x="1.21063in" svg:y="0.88858in" svg:width="5.84567in" svg:height="4.38425in" presentation:class="page" draw:id="id6" presentation:style-name="a326" draw:name="Образ слайда 1">
          <svg:desc/>
        </draw:page-thumbnail>
        <draw:frame draw:id="id7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desc/>
        </draw:frame>
        <draw:frame draw:id="id8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desc/>
        </draw:frame>
        <draw:frame draw:id="id9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desc/>
        </draw:frame>
        <draw:frame draw:id="id10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desc/>
        </draw:frame>
        <draw:frame draw:id="id11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343">
      <draw:custom-shape svg:x="0.52283in" svg:y="0.00039in" svg:width="0.24921in" svg:height="7.49921in" draw:id="id64" draw:layer="Master1-bg" draw:style-name="a346" draw:name="Rectangle 8"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65">
        <svg:desc/>
        <draw:custom-shape svg:x="8.91496in" svg:y="1.8437in" svg:width="3.58071in" svg:height="4.82008in" draw:id="id69" draw:layer="Master1-bg" draw:style-name="a361" draw:name="Freeform 6"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70" draw:layer="Master1-bg" draw:style-name="a364" draw:name="Freeform 6"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66" presentation:style-name="a350" draw:name="Заголовок 1" svg:x="0.9185in" svg:y="0.5in" svg:width="4.30039in" svg:height="1.75in" presentation:class="title" presentation:placeholder="false">
        <draw:text-box>
          <text:list text:style-name="a349">
            <text:list-item>
              <text:p text:style-name="a348" text:class-names="" text:cond-style-name=""><text:span text:style-name="a347" text:class-names="">Образец заголовка</text:span></text:p>
            </text:list-item>
          </text:list>
        </draw:text-box>
        <svg:desc/>
      </draw:frame>
      <draw:frame draw:id="id67" presentation:style-name="a354" draw:name="Рисунок 2" svg:x="5.6685in" svg:y="1.07992in" svg:width="6.75in" svg:height="5.32992in" presentation:class="title" presentation:placeholder="false">
        <draw:text-box>
          <text:list text:style-name="a353">
            <text:list-item>
              <text:p text:style-name="a352" text:class-names="" text:cond-style-name=""><text:span text:style-name="a351" text:class-names=""/></text:p>
            </text:list-item>
          </text:list>
        </draw:text-box>
        <svg:desc/>
      </draw:frame>
      <draw:frame draw:id="id68" presentation:style-name="a358" draw:name="Текст 3" svg:x="0.9185in" svg:y="2.25in" svg:width="4.30039in" svg:height="4.1685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Образец текста</text:span></text:p>
            </text:list-item>
          </text:list>
        </draw:text-box>
        <svg:desc/>
      </draw:frame>
      <presentation:notes style:page-layout-name="pageLayout2" draw:style-name="a381">
        <draw:page-thumbnail svg:x="1.21063in" svg:y="0.88858in" svg:width="5.84567in" svg:height="4.38425in" presentation:class="page" draw:id="id6" presentation:style-name="a365" draw:name="Образ слайда 1">
          <svg:desc/>
        </draw:page-thumbnail>
        <draw:frame draw:id="id7" presentation:style-name="a368" draw:name="Заметки 2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desc/>
        </draw:frame>
        <draw:frame draw:id="id8" presentation:style-name="a371" draw:name="Верхний колонтитул 3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desc/>
        </draw:frame>
        <draw:frame draw:id="id9" presentation:style-name="a374" draw:name="Дата 4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desc/>
        </draw:frame>
        <draw:frame draw:id="id10" presentation:style-name="a377" draw:name="Нижний колонтитул 5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desc/>
        </draw:frame>
        <draw:frame draw:id="id11" presentation:style-name="a380" draw:name="Номер слайда 6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382">
      <draw:custom-shape svg:x="0.52283in" svg:y="0.00039in" svg:width="0.24921in" svg:height="7.49921in" draw:id="id71" draw:layer="Master1-bg" draw:style-name="a385" draw:name="Rectangle 8"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72">
        <svg:desc/>
        <draw:custom-shape svg:x="8.91496in" svg:y="1.8437in" svg:width="3.58071in" svg:height="4.82008in" draw:id="id75" draw:layer="Master1-bg" draw:style-name="a408" draw:name="Freeform 6"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76" draw:layer="Master1-bg" draw:style-name="a411" draw:name="Freeform 6"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73" presentation:style-name="a389" draw:name="Заголовок 1" svg:x="1.5in" svg:y="0.75in" svg:width="10.49921in" svg:height="1.62441in" presentation:class="title" presentation:placeholder="false">
        <draw:text-box>
          <text:list text:style-name="a388">
            <text:list-item>
              <text:p text:style-name="a387" text:class-names="" text:cond-style-name=""><text:span text:style-name="a386" text:class-names="">Образец заголовка</text:span></text:p>
            </text:list-item>
          </text:list>
        </draw:text-box>
        <svg:desc/>
      </draw:frame>
      <draw:frame draw:id="id74" presentation:style-name="a405" draw:name="Вертикальный текст 2" svg:x="0.66654in" svg:y="1.75472in" svg:width="11.99961in" svg:height="4.94961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Образец текста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Второй уровень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6" presentation:style-name="a412" draw:name="Образ слайда 1">
          <svg:desc/>
        </draw:page-thumbnail>
        <draw:frame draw:id="id7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8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9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10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1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29">
      <draw:custom-shape svg:x="0.52283in" svg:y="0.00039in" svg:width="0.24921in" svg:height="7.49921in" draw:id="id77" draw:layer="Master1-bg" draw:style-name="a432" draw:name="Rectangle 8"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78">
        <svg:desc/>
        <draw:custom-shape svg:x="8.91496in" svg:y="1.8437in" svg:width="3.58071in" svg:height="4.82008in" draw:id="id81" draw:layer="Master1-bg" draw:style-name="a455" draw:name="Freeform 6"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08in" svg:y="0.81063in" svg:width="3.5815in" svg:height="4.82008in" draw:id="id82" draw:layer="Master1-bg" draw:style-name="a458" draw:name="Freeform 6"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79" presentation:style-name="a436" draw:name="Вертикальный заголовок 1" svg:x="9.66654in" svg:y="0.75in" svg:width="3in" svg:height="5.95472in" presentation:class="titl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заголовка</text:span></text:p>
            </text:list-item>
          </text:list>
        </draw:text-box>
        <svg:desc/>
      </draw:frame>
      <draw:frame draw:id="id80" presentation:style-name="a452" draw:name="Вертикальный текст 2" svg:x="0.66654in" svg:y="0.75in" svg:width="8.83346in" svg:height="5.9547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Образец текста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Второй уровень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5">
        <draw:page-thumbnail svg:x="1.21063in" svg:y="0.88858in" svg:width="5.84567in" svg:height="4.38425in" presentation:class="page" draw:id="id6" presentation:style-name="a459" draw:name="Образ слайда 1">
          <svg:desc/>
        </draw:page-thumbnail>
        <draw:frame draw:id="id7" presentation:style-name="a462" draw:name="Заметки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8" presentation:style-name="a465" draw:name="Верхний колонтитул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desc/>
        </draw:frame>
        <draw:frame draw:id="id9" presentation:style-name="a468" draw:name="Дата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10" presentation:style-name="a471" draw:name="Нижний колонтитул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11" presentation:style-name="a474" draw:name="Номер слайда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desc/>
        </draw:frame>
      </presentation:notes>
    </style:master-page>
    <style:master-page style:name="Master2-Обычный-1" style:page-layout-name="pageLayout1" draw:style-name="a476">
      <draw:custom-shape svg:x="0.52283in" svg:y="0.00039in" svg:width="0.24921in" svg:height="7.49921in" draw:id="id83" draw:style-name="a479" draw:name="Rectangle 8"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4" presentation:style-name="a483" draw:name="Заголовок 2" svg:x="0.66654in" svg:y="0.29921in" svg:width="11.99961in" svg:height="1.25197in" presentation:class="title" presentation:placeholder="false">
        <draw:text-box>
          <text:list text:style-name="a482">
            <text:list-item>
              <text:p text:style-name="a481" text:class-names="" text:cond-style-name=""><text:span text:style-name="a480" text:class-names=""/></text:p>
            </text:list-item>
          </text:list>
        </draw:text-box>
        <svg:desc/>
      </draw:frame>
      <draw:frame draw:id="id85" presentation:style-name="a499" draw:name="Текст 3" svg:x="0.66654in" svg:y="1.75472in" svg:width="11.99961in" svg:height="4.94961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Образец текста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Второй уровень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16">
        <draw:page-thumbnail svg:x="1.21063in" svg:y="0.88858in" svg:width="5.84567in" svg:height="4.38425in" presentation:class="page" draw:id="id6" presentation:style-name="a500" draw:name="Образ слайда 1">
          <svg:desc/>
        </draw:page-thumbnail>
        <draw:frame draw:id="id7" presentation:style-name="a503" draw:name="Заметки 2" svg:x="0.82677in" svg:y="5.55394in" svg:width="6.61378in" svg:height="5.26142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desc/>
        </draw:frame>
        <draw:frame draw:id="id8" presentation:style-name="a506" draw:name="Верхний колонтитул 3" svg:x="0in" svg:y="0in" svg:width="3.5878in" svg:height="0.58425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9" presentation:style-name="a509" draw:name="Дата 4" svg:x="4.67953in" svg:y="0in" svg:width="3.5878in" svg:height="0.58425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frame draw:id="id10" presentation:style-name="a512" draw:name="Нижний колонтитул 5" svg:x="0in" svg:y="11.10827in" svg:width="3.5878in" svg:height="0.58425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desc/>
        </draw:frame>
        <draw:frame draw:id="id11" presentation:style-name="a515" draw:name="Номер слайда 6" svg:x="4.67953in" svg:y="11.10827in" svg:width="3.5878in" svg:height="0.58425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Титульный-слайд" style:page-layout-name="pageLayout1" draw:style-name="a517">
      <draw:custom-shape svg:x="0.52283in" svg:y="0.00039in" svg:width="0.24921in" svg:height="7.49921in" draw:id="id86" draw:layer="Master2-bg" draw:style-name="a520" draw:name="Rectangle 8"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7" presentation:style-name="a524" draw:name="Заголовок 1" svg:x="1.66654in" svg:y="1.22756in" svg:width="10in" svg:height="2.61102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1" text:class-names="">Образец заголовка</text:span></text:p>
            </text:list-item>
          </text:list>
        </draw:text-box>
        <svg:desc/>
      </draw:frame>
      <draw:frame draw:id="id88" presentation:style-name="a528" draw:name="Подзаголовок 2" svg:x="1.66654in" svg:y="3.93937in" svg:width="10in" svg:height="1.81063in" presentation:class="subtitle" presentation:placeholder="false">
        <draw:text-box>
          <text:list text:style-name="a527">
            <text:list-item>
              <text:p text:style-name="a526" text:class-names="" text:cond-style-name=""><text:span text:style-name="a525" text:class-names="">Образец подзаголовка</text:span></text:p>
            </text:list-item>
          </text:list>
        </draw:text-box>
        <svg:desc/>
      </draw:frame>
      <draw:frame draw:id="id89" presentation:style-name="a532" draw:name="Текст 3" svg:x="0.66654in" svg:y="1.75472in" svg:width="11.99961in" svg:height="4.9496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desc/>
      </draw:frame>
      <presentation:notes style:page-layout-name="pageLayout2" draw:style-name="a549">
        <draw:page-thumbnail svg:x="1.21063in" svg:y="0.88858in" svg:width="5.84567in" svg:height="4.38425in" presentation:class="page" draw:id="id6" presentation:style-name="a533" draw:name="Образ слайда 1">
          <svg:desc/>
        </draw:page-thumbnail>
        <draw:frame draw:id="id7" presentation:style-name="a536" draw:name="Заметки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desc/>
        </draw:frame>
        <draw:frame draw:id="id8" presentation:style-name="a539" draw:name="Верхний колонтитул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desc/>
        </draw:frame>
        <draw:frame draw:id="id9" presentation:style-name="a542" draw:name="Дата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desc/>
        </draw:frame>
        <draw:frame draw:id="id10" presentation:style-name="a545" draw:name="Нижний колонтитул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desc/>
        </draw:frame>
        <draw:frame draw:id="id11" presentation:style-name="a548" draw:name="Номер слайда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Заголовок-и-объект" style:page-layout-name="pageLayout1" draw:style-name="a550">
      <draw:custom-shape svg:x="0.52283in" svg:y="0.00039in" svg:width="0.24921in" svg:height="7.49921in" draw:id="id90" draw:layer="Master2-bg" draw:style-name="a553" draw:name="Rectangle 8"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1" presentation:style-name="a557" draw:name="Заголовок 1" svg:x="0.66654in" svg:y="0.29921in" svg:width="11.99961in" svg:height="1.25197in" presentation:class="title" presentation:placeholder="false">
        <draw:text-box>
          <text:list text:style-name="a556">
            <text:list-item>
              <text:p text:style-name="a555" text:class-names="" text:cond-style-name=""><text:span text:style-name="a554" text:class-names="">Образец заголовка</text:span></text:p>
            </text:list-item>
          </text:list>
        </draw:text-box>
        <svg:desc/>
      </draw:frame>
      <draw:frame draw:id="id92" presentation:style-name="a561" draw:name="Объект 2" svg:x="0.66654in" svg:y="1.75472in" svg:width="11.99961in" svg:height="4.94961in" presentation:class="title" presentation:placeholder="false">
        <draw:text-box>
          <text:list text:style-name="a560">
            <text:list-item>
              <text:p text:style-name="a559" text:class-names="" text:cond-style-name=""><text:span text:style-name="a558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93" presentation:style-name="a565" draw:name="Содержимое 3" svg:x="0.66654in" svg:y="1.75472in" svg:width="11.99961in" svg:height="4.94961in" presentation:class="object" presentation:placeholder="false">
        <draw:text-box>
          <text:list text:style-name="a564">
            <text:list-item>
              <text:p text:style-name="a563" text:class-names="" text:cond-style-name=""><text:span text:style-name="a562" text:class-names=""/></text:p>
            </text:list-item>
          </text:list>
        </draw:text-box>
        <svg:desc/>
      </draw:frame>
      <presentation:notes style:page-layout-name="pageLayout2" draw:style-name="a582">
        <draw:page-thumbnail svg:x="1.21063in" svg:y="0.88858in" svg:width="5.84567in" svg:height="4.38425in" presentation:class="page" draw:id="id6" presentation:style-name="a566" draw:name="Образ слайда 1">
          <svg:desc/>
        </draw:page-thumbnail>
        <draw:frame draw:id="id7" presentation:style-name="a569" draw:name="Заметки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desc/>
        </draw:frame>
        <draw:frame draw:id="id8" presentation:style-name="a572" draw:name="Верхний колонтитул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desc/>
        </draw:frame>
        <draw:frame draw:id="id9" presentation:style-name="a575" draw:name="Дата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desc/>
        </draw:frame>
        <draw:frame draw:id="id10" presentation:style-name="a578" draw:name="Нижний колонтитул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desc/>
        </draw:frame>
        <draw:frame draw:id="id11" presentation:style-name="a581" draw:name="Номер слайда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Заголовок-раздела" style:page-layout-name="pageLayout1" draw:style-name="a583">
      <draw:custom-shape svg:x="0.52283in" svg:y="0.00039in" svg:width="0.24921in" svg:height="7.49921in" draw:id="id94" draw:layer="Master2-bg" draw:style-name="a586" draw:name="Rectangle 8"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5" presentation:style-name="a590" draw:name="Заголовок 1" svg:x="0.90984in" svg:y="1.86969in" svg:width="11.5in" svg:height="3.11969in" presentation:class="title" presentation:placeholder="false">
        <draw:text-box>
          <text:list text:style-name="a589">
            <text:list-item>
              <text:p text:style-name="a588" text:class-names="" text:cond-style-name=""><text:span text:style-name="a587" text:class-names="">Образец заголовка</text:span></text:p>
            </text:list-item>
          </text:list>
        </draw:text-box>
        <svg:desc/>
      </draw:frame>
      <draw:frame draw:id="id96" presentation:style-name="a594" draw:name="Текст 2" svg:x="0.90984in" svg:y="5.01929in" svg:width="11.5in" svg:height="1.64055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Образец текста</text:span></text:p>
            </text:list-item>
          </text:list>
        </draw:text-box>
        <svg:desc/>
      </draw:frame>
      <presentation:notes style:page-layout-name="pageLayout2" draw:style-name="a611">
        <draw:page-thumbnail svg:x="1.21063in" svg:y="0.88858in" svg:width="5.84567in" svg:height="4.38425in" presentation:class="page" draw:id="id6" presentation:style-name="a595" draw:name="Образ слайда 1">
          <svg:desc/>
        </draw:page-thumbnail>
        <draw:frame draw:id="id7" presentation:style-name="a598" draw:name="Заметки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desc/>
        </draw:frame>
        <draw:frame draw:id="id8" presentation:style-name="a601" draw:name="Верхний колонтитул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desc/>
        </draw:frame>
        <draw:frame draw:id="id9" presentation:style-name="a604" draw:name="Дата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desc/>
        </draw:frame>
        <draw:frame draw:id="id10" presentation:style-name="a607" draw:name="Нижний колонтитул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desc/>
        </draw:frame>
        <draw:frame draw:id="id11" presentation:style-name="a610" draw:name="Номер слайда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Два-объекта" style:page-layout-name="pageLayout1" draw:style-name="a612">
      <draw:custom-shape svg:x="0.52283in" svg:y="0.00039in" svg:width="0.24921in" svg:height="7.49921in" draw:id="id97" draw:layer="Master2-bg" draw:style-name="a615" draw:name="Rectangle 8">
        <svg:desc/>
        <text:p text:style-name="a614" text:class-names="" text:cond-style-name=""><text:span text:style-name="a6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8" presentation:style-name="a619" draw:name="Заголовок 1" svg:x="0.66654in" svg:y="0.29921in" svg:width="11.99961in" svg:height="1.25197in" presentation:class="title" presentation:placeholder="false">
        <draw:text-box>
          <text:list text:style-name="a618">
            <text:list-item>
              <text:p text:style-name="a617" text:class-names="" text:cond-style-name=""><text:span text:style-name="a616" text:class-names="">Образец заголовка</text:span></text:p>
            </text:list-item>
          </text:list>
        </draw:text-box>
        <svg:desc/>
      </draw:frame>
      <draw:frame draw:id="id99" presentation:style-name="a623" draw:name="Объект 2" svg:x="0.66654in" svg:y="1.75512in" svg:width="5.91653in" svg:height="4.94961in" presentation:class="title" presentation:placeholder="false">
        <draw:text-box>
          <text:list text:style-name="a622">
            <text:list-item>
              <text:p text:style-name="a621" text:class-names="" text:cond-style-name=""><text:span text:style-name="a620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100" presentation:style-name="a627" draw:name="Объект 3" svg:x="6.75in" svg:y="1.75512in" svg:width="5.91653in" svg:height="4.94961in" presentation:class="title" presentation:placeholder="false">
        <draw:text-box>
          <text:list text:style-name="a626">
            <text:list-item>
              <text:p text:style-name="a625" text:class-names="" text:cond-style-name=""><text:span text:style-name="a624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presentation:notes style:page-layout-name="pageLayout2" draw:style-name="a644">
        <draw:page-thumbnail svg:x="1.21063in" svg:y="0.88858in" svg:width="5.84567in" svg:height="4.38425in" presentation:class="page" draw:id="id6" presentation:style-name="a628" draw:name="Образ слайда 1">
          <svg:desc/>
        </draw:page-thumbnail>
        <draw:frame draw:id="id7" presentation:style-name="a631" draw:name="Заметки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desc/>
        </draw:frame>
        <draw:frame draw:id="id8" presentation:style-name="a634" draw:name="Верхний колонтитул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desc/>
        </draw:frame>
        <draw:frame draw:id="id9" presentation:style-name="a637" draw:name="Дата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desc/>
        </draw:frame>
        <draw:frame draw:id="id10" presentation:style-name="a640" draw:name="Нижний колонтитул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desc/>
        </draw:frame>
        <draw:frame draw:id="id11" presentation:style-name="a643" draw:name="Номер слайда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Сравнение" style:page-layout-name="pageLayout1" draw:style-name="a645">
      <draw:custom-shape svg:x="0.52283in" svg:y="0.00039in" svg:width="0.24921in" svg:height="7.49921in" draw:id="id101" draw:layer="Master2-bg" draw:style-name="a648" draw:name="Rectangle 8"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2" presentation:style-name="a652" draw:name="Заголовок 1" svg:x="0.9185in" svg:y="0.39921in" svg:width="11.5in" svg:height="1.44961in" presentation:class="title" presentation:placeholder="false">
        <draw:text-box>
          <text:list text:style-name="a651">
            <text:list-item>
              <text:p text:style-name="a650" text:class-names="" text:cond-style-name=""><text:span text:style-name="a649" text:class-names="">Образец заголовка</text:span></text:p>
            </text:list-item>
          </text:list>
        </draw:text-box>
        <svg:desc/>
      </draw:frame>
      <draw:frame draw:id="id103" presentation:style-name="a656" draw:name="Текст 2" svg:x="0.9185in" svg:y="1.83858in" svg:width="5.64055in" svg:height="0.90118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Образец текста</text:span></text:p>
            </text:list-item>
          </text:list>
        </draw:text-box>
        <svg:desc/>
      </draw:frame>
      <draw:frame draw:id="id104" presentation:style-name="a660" draw:name="Объект 3" svg:x="0.9185in" svg:y="2.73976in" svg:width="5.64055in" svg:height="4.02953in" presentation:class="title" presentation:placeholder="false">
        <draw:text-box>
          <text:list text:style-name="a659">
            <text:list-item>
              <text:p text:style-name="a658" text:class-names="" text:cond-style-name=""><text:span text:style-name="a657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105" presentation:style-name="a664" draw:name="Текст 4" svg:x="6.75in" svg:y="1.83858in" svg:width="5.6685in" svg:height="0.90118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Образец текста</text:span></text:p>
            </text:list-item>
          </text:list>
        </draw:text-box>
        <svg:desc/>
      </draw:frame>
      <draw:frame draw:id="id106" presentation:style-name="a668" draw:name="Объект 5" svg:x="6.75in" svg:y="2.73976in" svg:width="5.6685in" svg:height="4.02953in" presentation:class="title" presentation:placeholder="false">
        <draw:text-box>
          <text:list text:style-name="a667">
            <text:list-item>
              <text:p text:style-name="a666" text:class-names="" text:cond-style-name=""><text:span text:style-name="a665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presentation:notes style:page-layout-name="pageLayout2" draw:style-name="a685">
        <draw:page-thumbnail svg:x="1.21063in" svg:y="0.88858in" svg:width="5.84567in" svg:height="4.38425in" presentation:class="page" draw:id="id6" presentation:style-name="a669" draw:name="Образ слайда 1">
          <svg:desc/>
        </draw:page-thumbnail>
        <draw:frame draw:id="id7" presentation:style-name="a672" draw:name="Заметки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desc/>
        </draw:frame>
        <draw:frame draw:id="id8" presentation:style-name="a675" draw:name="Верхний колонтитул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desc/>
        </draw:frame>
        <draw:frame draw:id="id9" presentation:style-name="a678" draw:name="Дата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desc/>
        </draw:frame>
        <draw:frame draw:id="id10" presentation:style-name="a681" draw:name="Нижний колонтитул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desc/>
        </draw:frame>
        <draw:frame draw:id="id11" presentation:style-name="a684" draw:name="Номер слайда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Только-заголовок" style:page-layout-name="pageLayout1" draw:style-name="a686">
      <draw:custom-shape svg:x="0.52283in" svg:y="0.00039in" svg:width="0.24921in" svg:height="7.49921in" draw:id="id107" draw:layer="Master2-bg" draw:style-name="a689" draw:name="Rectangle 8"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8" presentation:style-name="a693" draw:name="Заголовок 1" svg:x="0.66654in" svg:y="0.29921in" svg:width="11.99961in" svg:height="1.25197in" presentation:class="title" presentation:placeholder="false">
        <draw:text-box>
          <text:list text:style-name="a692">
            <text:list-item>
              <text:p text:style-name="a691" text:class-names="" text:cond-style-name=""><text:span text:style-name="a690" text:class-names="">Образец заголовка</text:span></text:p>
            </text:list-item>
          </text:list>
        </draw:text-box>
        <svg:desc/>
      </draw:frame>
      <presentation:notes style:page-layout-name="pageLayout2" draw:style-name="a710">
        <draw:page-thumbnail svg:x="1.21063in" svg:y="0.88858in" svg:width="5.84567in" svg:height="4.38425in" presentation:class="page" draw:id="id6" presentation:style-name="a694" draw:name="Образ слайда 1">
          <svg:desc/>
        </draw:page-thumbnail>
        <draw:frame draw:id="id7" presentation:style-name="a697" draw:name="Заметки 2" svg:x="0.82677in" svg:y="5.55394in" svg:width="6.61378in" svg:height="5.26142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desc/>
        </draw:frame>
        <draw:frame draw:id="id8" presentation:style-name="a700" draw:name="Верхний колонтитул 3" svg:x="0in" svg:y="0in" svg:width="3.5878in" svg:height="0.5842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desc/>
        </draw:frame>
        <draw:frame draw:id="id9" presentation:style-name="a703" draw:name="Дата 4" svg:x="4.67953in" svg:y="0in" svg:width="3.5878in" svg:height="0.58425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0" presentation:style-name="a706" draw:name="Нижний колонтитул 5" svg:x="0in" svg:y="11.10827in" svg:width="3.5878in" svg:height="0.58425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frame draw:id="id11" presentation:style-name="a709" draw:name="Номер слайда 6" svg:x="4.67953in" svg:y="11.10827in" svg:width="3.5878in" svg:height="0.58425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Пустой-слайд" style:page-layout-name="pageLayout1" draw:style-name="a711">
      <draw:custom-shape svg:x="0.52283in" svg:y="0.00039in" svg:width="0.24921in" svg:height="7.49921in" draw:id="id109" draw:layer="Master2-bg" draw:style-name="a714" draw:name="Rectangle 8">
        <svg:desc/>
        <text:p text:style-name="a713" text:class-names="" text:cond-style-name=""><text:span text:style-name="a7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0" presentation:style-name="a718" draw:name="Заголовок 1" svg:x="0.66654in" svg:y="0.29921in" svg:width="11.99961in" svg:height="1.25197in" presentation:class="title" presentation:placeholder="false">
        <draw:text-box>
          <text:list text:style-name="a717">
            <text:list-item>
              <text:p text:style-name="a716" text:class-names="" text:cond-style-name=""><text:span text:style-name="a715" text:class-names=""/></text:p>
            </text:list-item>
          </text:list>
        </draw:text-box>
        <svg:desc/>
      </draw:frame>
      <draw:frame draw:id="id111" presentation:style-name="a722" draw:name="Текст 2" svg:x="0.66654in" svg:y="1.75472in" svg:width="11.99961in" svg:height="4.94961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/></text:p>
            </text:list-item>
          </text:list>
        </draw:text-box>
        <svg:desc/>
      </draw:frame>
      <presentation:notes style:page-layout-name="pageLayout2" draw:style-name="a739">
        <draw:page-thumbnail svg:x="1.21063in" svg:y="0.88858in" svg:width="5.84567in" svg:height="4.38425in" presentation:class="page" draw:id="id6" presentation:style-name="a723" draw:name="Образ слайда 1">
          <svg:desc/>
        </draw:page-thumbnail>
        <draw:frame draw:id="id7" presentation:style-name="a726" draw:name="Заметки 2" svg:x="0.82677in" svg:y="5.55394in" svg:width="6.61378in" svg:height="5.26142in" presentation:class="notes" presentation:placeholder="false">
          <draw:text-box>
            <text:p text:style-name="a725" text:class-names="" text:cond-style-name=""><text:span text:style-name="a724" text:class-names=""/></text:p>
          </draw:text-box>
          <svg:desc/>
        </draw:frame>
        <draw:frame draw:id="id8" presentation:style-name="a729" draw:name="Верхний колонтитул 3" svg:x="0in" svg:y="0in" svg:width="3.5878in" svg:height="0.58425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desc/>
        </draw:frame>
        <draw:frame draw:id="id9" presentation:style-name="a732" draw:name="Дата 4" svg:x="4.67953in" svg:y="0in" svg:width="3.5878in" svg:height="0.58425in" presentation:class="date-time" presentation:placeholder="false">
          <draw:text-box>
            <text:p text:style-name="a731" text:class-names="" text:cond-style-name=""><text:span text:style-name="a730" text:class-names=""/></text:p>
          </draw:text-box>
          <svg:desc/>
        </draw:frame>
        <draw:frame draw:id="id10" presentation:style-name="a735" draw:name="Нижний колонтитул 5" svg:x="0in" svg:y="11.10827in" svg:width="3.5878in" svg:height="0.58425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desc/>
        </draw:frame>
        <draw:frame draw:id="id11" presentation:style-name="a738" draw:name="Номер слайда 6" svg:x="4.67953in" svg:y="11.10827in" svg:width="3.5878in" svg:height="0.58425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Объект-с-подписью" style:page-layout-name="pageLayout1" draw:style-name="a740">
      <draw:custom-shape svg:x="0.52283in" svg:y="0.00039in" svg:width="0.24921in" svg:height="7.49921in" draw:id="id112" draw:layer="Master2-bg" draw:style-name="a743" draw:name="Rectangle 8"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747" draw:name="Заголовок 1" svg:x="0.9185in" svg:y="0.5in" svg:width="4.30039in" svg:height="1.75in" presentation:class="title" presentation:placeholder="false">
        <draw:text-box>
          <text:list text:style-name="a746">
            <text:list-item>
              <text:p text:style-name="a745" text:class-names="" text:cond-style-name=""><text:span text:style-name="a744" text:class-names="">Образец заголовка</text:span></text:p>
            </text:list-item>
          </text:list>
        </draw:text-box>
        <svg:desc/>
      </draw:frame>
      <draw:frame draw:id="id114" presentation:style-name="a751" draw:name="Объект 2" svg:x="5.6685in" svg:y="1.07992in" svg:width="6.75in" svg:height="5.32992in" presentation:class="title" presentation:placeholder="false">
        <draw:text-box>
          <text:list text:style-name="a750">
            <text:list-item>
              <text:p text:style-name="a749" text:class-names="" text:cond-style-name=""><text:span text:style-name="a748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115" presentation:style-name="a755" draw:name="Текст 3" svg:x="0.9185in" svg:y="2.25in" svg:width="4.30039in" svg:height="4.1685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Образец текста</text:span></text:p>
            </text:list-item>
          </text:list>
        </draw:text-box>
        <svg:desc/>
      </draw:frame>
      <presentation:notes style:page-layout-name="pageLayout2" draw:style-name="a772">
        <draw:page-thumbnail svg:x="1.21063in" svg:y="0.88858in" svg:width="5.84567in" svg:height="4.38425in" presentation:class="page" draw:id="id6" presentation:style-name="a756" draw:name="Образ слайда 1">
          <svg:desc/>
        </draw:page-thumbnail>
        <draw:frame draw:id="id7" presentation:style-name="a759" draw:name="Заметки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desc/>
        </draw:frame>
        <draw:frame draw:id="id8" presentation:style-name="a762" draw:name="Верхний колонтитул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desc/>
        </draw:frame>
        <draw:frame draw:id="id9" presentation:style-name="a765" draw:name="Дата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desc/>
        </draw:frame>
        <draw:frame draw:id="id10" presentation:style-name="a768" draw:name="Нижний колонтитул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desc/>
        </draw:frame>
        <draw:frame draw:id="id11" presentation:style-name="a771" draw:name="Номер слайда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Рисунок-с-подписью" style:page-layout-name="pageLayout1" draw:style-name="a773">
      <draw:custom-shape svg:x="0.52283in" svg:y="0.00039in" svg:width="0.24921in" svg:height="7.49921in" draw:id="id116" draw:layer="Master2-bg" draw:style-name="a776" draw:name="Rectangle 8"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7" presentation:style-name="a780" draw:name="Заголовок 1" svg:x="0.9185in" svg:y="0.5in" svg:width="4.30039in" svg:height="1.75in" presentation:class="title" presentation:placeholder="false">
        <draw:text-box>
          <text:list text:style-name="a779">
            <text:list-item>
              <text:p text:style-name="a778" text:class-names="" text:cond-style-name=""><text:span text:style-name="a777" text:class-names="">Образец заголовка</text:span></text:p>
            </text:list-item>
          </text:list>
        </draw:text-box>
        <svg:desc/>
      </draw:frame>
      <draw:frame draw:id="id118" presentation:style-name="a784" draw:name="Рисунок 2" svg:x="5.6685in" svg:y="1.07992in" svg:width="6.75in" svg:height="5.32992in" presentation:class="title" presentation:placeholder="false">
        <draw:text-box>
          <text:list text:style-name="a783">
            <text:list-item>
              <text:p text:style-name="a782" text:class-names="" text:cond-style-name=""><text:span text:style-name="a781" text:class-names=""/></text:p>
            </text:list-item>
          </text:list>
        </draw:text-box>
        <svg:desc/>
      </draw:frame>
      <draw:frame draw:id="id119" presentation:style-name="a788" draw:name="Текст 3" svg:x="0.9185in" svg:y="2.25in" svg:width="4.30039in" svg:height="4.1685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Образец текста</text:span></text:p>
            </text:list-item>
          </text:list>
        </draw:text-box>
        <svg:desc/>
      </draw:frame>
      <presentation:notes style:page-layout-name="pageLayout2" draw:style-name="a805">
        <draw:page-thumbnail svg:x="1.21063in" svg:y="0.88858in" svg:width="5.84567in" svg:height="4.38425in" presentation:class="page" draw:id="id6" presentation:style-name="a789" draw:name="Образ слайда 1">
          <svg:desc/>
        </draw:page-thumbnail>
        <draw:frame draw:id="id7" presentation:style-name="a792" draw:name="Заметки 2" svg:x="0.82677in" svg:y="5.55394in" svg:width="6.61378in" svg:height="5.26142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desc/>
        </draw:frame>
        <draw:frame draw:id="id8" presentation:style-name="a795" draw:name="Верхний колонтитул 3" svg:x="0in" svg:y="0in" svg:width="3.5878in" svg:height="0.58425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desc/>
        </draw:frame>
        <draw:frame draw:id="id9" presentation:style-name="a798" draw:name="Дата 4" svg:x="4.67953in" svg:y="0in" svg:width="3.5878in" svg:height="0.58425in" presentation:class="date-time" presentation:placeholder="false">
          <draw:text-box>
            <text:p text:style-name="a797" text:class-names="" text:cond-style-name=""><text:span text:style-name="a796" text:class-names=""/></text:p>
          </draw:text-box>
          <svg:desc/>
        </draw:frame>
        <draw:frame draw:id="id10" presentation:style-name="a801" draw:name="Нижний колонтитул 5" svg:x="0in" svg:y="11.10827in" svg:width="3.5878in" svg:height="0.58425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desc/>
        </draw:frame>
        <draw:frame draw:id="id11" presentation:style-name="a804" draw:name="Номер слайда 6" svg:x="4.67953in" svg:y="11.10827in" svg:width="3.5878in" svg:height="0.58425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Заголовок-и-вертикальный-текст" style:page-layout-name="pageLayout1" draw:style-name="a806">
      <draw:custom-shape svg:x="0.52283in" svg:y="0.00039in" svg:width="0.24921in" svg:height="7.49921in" draw:id="id120" draw:layer="Master2-bg" draw:style-name="a809" draw:name="Rectangle 8"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1" presentation:style-name="a813" draw:name="Заголовок 1" svg:x="0.66654in" svg:y="0.29921in" svg:width="11.99961in" svg:height="1.25197in" presentation:class="title" presentation:placeholder="false">
        <draw:text-box>
          <text:list text:style-name="a812">
            <text:list-item>
              <text:p text:style-name="a811" text:class-names="" text:cond-style-name=""><text:span text:style-name="a810" text:class-names="">Образец заголовка</text:span></text:p>
            </text:list-item>
          </text:list>
        </draw:text-box>
        <svg:desc/>
      </draw:frame>
      <draw:frame draw:id="id122" presentation:style-name="a829" draw:name="Вертикальный текст 2" svg:x="0.66654in" svg:y="1.75472in" svg:width="11.99961in" svg:height="4.94961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Образец текста</text:span></text:p>
            </text:list-item>
          </text:list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Второй уровень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list text:style-name="a828">
                            <text:list-item>
                              <text:p text:style-name="a827" text:class-names="" text:cond-style-name=""><text:span text:style-name="a82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846">
        <draw:page-thumbnail svg:x="1.21063in" svg:y="0.88858in" svg:width="5.84567in" svg:height="4.38425in" presentation:class="page" draw:id="id6" presentation:style-name="a830" draw:name="Образ слайда 1">
          <svg:desc/>
        </draw:page-thumbnail>
        <draw:frame draw:id="id7" presentation:style-name="a833" draw:name="Заметки 2" svg:x="0.82677in" svg:y="5.55394in" svg:width="6.61378in" svg:height="5.26142in" presentation:class="notes" presentation:placeholder="false">
          <draw:text-box>
            <text:p text:style-name="a832" text:class-names="" text:cond-style-name=""><text:span text:style-name="a831" text:class-names=""/></text:p>
          </draw:text-box>
          <svg:desc/>
        </draw:frame>
        <draw:frame draw:id="id8" presentation:style-name="a836" draw:name="Верхний колонтитул 3" svg:x="0in" svg:y="0in" svg:width="3.5878in" svg:height="0.58425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desc/>
        </draw:frame>
        <draw:frame draw:id="id9" presentation:style-name="a839" draw:name="Дата 4" svg:x="4.67953in" svg:y="0in" svg:width="3.5878in" svg:height="0.58425in" presentation:class="date-time" presentation:placeholder="false">
          <draw:text-box>
            <text:p text:style-name="a838" text:class-names="" text:cond-style-name=""><text:span text:style-name="a837" text:class-names=""/></text:p>
          </draw:text-box>
          <svg:desc/>
        </draw:frame>
        <draw:frame draw:id="id10" presentation:style-name="a842" draw:name="Нижний колонтитул 5" svg:x="0in" svg:y="11.10827in" svg:width="3.5878in" svg:height="0.58425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desc/>
        </draw:frame>
        <draw:frame draw:id="id11" presentation:style-name="a845" draw:name="Номер слайда 6" svg:x="4.67953in" svg:y="11.10827in" svg:width="3.5878in" svg:height="0.58425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47">
      <draw:custom-shape svg:x="0.52283in" svg:y="0.00039in" svg:width="0.24921in" svg:height="7.49921in" draw:id="id123" draw:layer="Master2-bg" draw:style-name="a850" draw:name="Rectangle 8">
        <svg:desc/>
        <text:p text:style-name="a849" text:class-names="" text:cond-style-name=""><text:span text:style-name="a8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854" draw:name="Вертикальный заголовок 1" svg:x="9.66654in" svg:y="0.29843in" svg:width="3in" svg:height="6.4063in" presentation:class="titl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заголовка</text:span></text:p>
            </text:list-item>
          </text:list>
        </draw:text-box>
        <svg:desc/>
      </draw:frame>
      <draw:frame draw:id="id125" presentation:style-name="a870" draw:name="Вертикальный текст 2" svg:x="0.66654in" svg:y="0.29843in" svg:width="8.83346in" svg:height="6.4063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Образец текста</text:span></text:p>
            </text:list-item>
          </text:list>
          <text:list text:style-name="a860">
            <text:list-item>
              <text:list text:style-name="a860">
                <text:list-item>
                  <text:p text:style-name="a859" text:class-names="" text:cond-style-name=""><text:span text:style-name="a858" text:class-names="">Второй уровень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p text:style-name="a865" text:class-names="" text:cond-style-name=""><text:span text:style-name="a8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list text:style-name="a869">
                            <text:list-item>
                              <text:p text:style-name="a868" text:class-names="" text:cond-style-name=""><text:span text:style-name="a8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887">
        <draw:page-thumbnail svg:x="1.21063in" svg:y="0.88858in" svg:width="5.84567in" svg:height="4.38425in" presentation:class="page" draw:id="id6" presentation:style-name="a871" draw:name="Образ слайда 1">
          <svg:desc/>
        </draw:page-thumbnail>
        <draw:frame draw:id="id7" presentation:style-name="a874" draw:name="Заметки 2" svg:x="0.82677in" svg:y="5.55394in" svg:width="6.61378in" svg:height="5.26142in" presentation:class="notes" presentation:placeholder="false">
          <draw:text-box>
            <text:p text:style-name="a873" text:class-names="" text:cond-style-name=""><text:span text:style-name="a872" text:class-names=""/></text:p>
          </draw:text-box>
          <svg:desc/>
        </draw:frame>
        <draw:frame draw:id="id8" presentation:style-name="a877" draw:name="Верхний колонтитул 3" svg:x="0in" svg:y="0in" svg:width="3.5878in" svg:height="0.58425in" presentation:class="header" presentation:placeholder="false">
          <draw:text-box>
            <text:p text:style-name="a876" text:class-names="" text:cond-style-name=""><text:span text:style-name="a875" text:class-names=""/></text:p>
          </draw:text-box>
          <svg:desc/>
        </draw:frame>
        <draw:frame draw:id="id9" presentation:style-name="a880" draw:name="Дата 4" svg:x="4.67953in" svg:y="0in" svg:width="3.5878in" svg:height="0.58425in" presentation:class="date-time" presentation:placeholder="false">
          <draw:text-box>
            <text:p text:style-name="a879" text:class-names="" text:cond-style-name=""><text:span text:style-name="a878" text:class-names=""/></text:p>
          </draw:text-box>
          <svg:desc/>
        </draw:frame>
        <draw:frame draw:id="id10" presentation:style-name="a883" draw:name="Нижний колонтитул 5" svg:x="0in" svg:y="11.10827in" svg:width="3.5878in" svg:height="0.58425in" presentation:class="footer" presentation:placeholder="false">
          <draw:text-box>
            <text:p text:style-name="a882" text:class-names="" text:cond-style-name=""><text:span text:style-name="a881" text:class-names=""/></text:p>
          </draw:text-box>
          <svg:desc/>
        </draw:frame>
        <draw:frame draw:id="id11" presentation:style-name="a886" draw:name="Номер слайда 6" svg:x="4.67953in" svg:y="11.10827in" svg:width="3.5878in" svg:height="0.58425in" presentation:class="page-number" presentation:placeholder="false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888">
      <draw:frame draw:id="id126" presentation:style-name="a891" draw:name="Верхний колонтитул 1" svg:x="0in" svg:y="0in" svg:width="3.5878in" svg:height="0.58425in" presentation:class="header" presentation:placeholder="false">
        <draw:text-box>
          <text:p text:style-name="a890" text:class-names="" text:cond-style-name=""><text:span text:style-name="a889" text:class-names=""/></text:p>
        </draw:text-box>
        <svg:desc/>
      </draw:frame>
      <draw:frame draw:id="id127" presentation:style-name="a894" draw:name="Дата 2" svg:x="4.67953in" svg:y="0in" svg:width="3.5878in" svg:height="0.58425in" presentation:class="date-time" presentation:placeholder="false">
        <draw:text-box>
          <text:p text:style-name="a893" text:class-names="" text:cond-style-name=""><text:span text:style-name="a892" text:class-names=""/></text:p>
        </draw:text-box>
        <svg:desc/>
      </draw:frame>
      <draw:frame draw:id="id128" presentation:style-name="a897" draw:name="Нижний колонтитул 3" svg:x="0in" svg:y="11.10827in" svg:width="3.5878in" svg:height="0.58425in" presentation:class="footer" presentation:placeholder="false">
        <draw:text-box>
          <text:p text:style-name="a896" text:class-names="" text:cond-style-name=""><text:span text:style-name="a895" text:class-names=""/></text:p>
        </draw:text-box>
        <svg:desc/>
      </draw:frame>
      <draw:frame draw:id="id129" presentation:style-name="a900" draw:name="Номер слайда 4" svg:x="4.67953in" svg:y="11.10827in" svg:width="3.5878in" svg:height="0.58425in" presentation:class="page-number" presentation:placeholder="false">
        <draw:text-box>
          <text:p text:style-name="a899" text:class-names="" text:cond-style-name=""><text:span text:style-name="a898" text:class-names=""><text:page-number style:num-format="1" text:fixed="false"/></text:span></text:p>
        </draw:text-box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236in" svg:width="3.39063in" svg:height="1.90625in"/>
      <draw:page-thumbnail draw:page-number="4" svg:x="4.29861in" svg:y="4.89236in" svg:width="3.39063in" svg:height="1.90625in"/>
      <draw:page-thumbnail draw:page-number="5" svg:x="0.57813in" svg:y="8.28299in" svg:width="3.39063in" svg:height="1.90625in"/>
      <draw:page-thumbnail draw:page-number="6" svg:x="4.29861in" svg:y="8.28299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Семья и брак</dc:title>
    <meta:initial-creator>Полина</meta:initial-creator>
    <dc:creator>Полина</dc:creator>
    <meta:creation-date>2026-05-11T15:45:00Z</meta:creation-date>
    <dc:date>2026-05-11T15:45:00Z</dc:date>
    <meta:editing-cycles>19</meta:editing-cycles>
    <meta:editing-duration>PT645S</meta:editing-duration>
    <meta:document-statistic meta:paragraph-count="89" meta:word-count="718"/>
  </office:meta>
</office:document-meta>
</file>