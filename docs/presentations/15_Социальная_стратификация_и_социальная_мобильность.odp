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4%" fo:text-align="center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272f3d" style:text-line-through-type="none" style:text-line-through-style="none" style:text-line-through-width="auto" style:text-line-through-color="font-color" style:text-position="0% 100%" fo:font-family="Rostelecom Basi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272f3d" style:text-line-through-type="none" style:text-line-through-style="none" style:text-line-through-width="auto" style:text-line-through-color="font-color" style:text-position="0% 100%" fo:font-family="Rostelecom Basi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272f3d" style:text-line-through-type="none" style:text-line-through-style="none" style:text-line-through-width="auto" style:text-line-through-color="font-color" style:text-position="0% 100%" fo:font-family="Rostelecom Basi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draw:fill="solid" draw:fill-color="#156082" draw:opacity="100%" draw:stroke="solid" svg:stroke-width="0.02778in" svg:stroke-color="#0c445e" svg:stroke-opacity="100%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Noto Sans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Noto Sans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72f3d" style:text-line-through-type="none" style:text-line-through-style="none" style:text-line-through-width="auto" style:text-line-through-color="font-color" style:text-position="0% 100%" fo:font-family="Rostelecom Basi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4%" style:tab-stop-distance="1in" fo:margin-left="0in" fo:margin-right="0in" fo:text-indent="0in" fo:margin-top="0.13889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rter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Charter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rter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draw:fill="none" fo:clip="rect(0in, 0in, 0in, 0in)" draw:stroke="none"/>
    </style:style>
    <style:style style:family="text" style:name="a1118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draw:fill="solid" draw:fill-color="#156082" draw:opacity="100%" draw:stroke="solid" svg:stroke-width="0.02778in" svg:stroke-color="#0c445e" svg:stroke-opacity="100%"/>
    </style:style>
    <style:style style:family="graphic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draw:fill="solid" draw:fill-color="#156082" draw:opacity="100%" draw:stroke="solid" svg:stroke-width="0.02778in" svg:stroke-color="#0c445e" svg:stroke-opacity="100%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89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draw:fill="solid" draw:fill-color="#156082" draw:opacity="100%" draw:stroke="solid" svg:stroke-width="0.02778in" svg:stroke-color="#0c445e" svg:stroke-opacity="100%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9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draw:fill="solid" draw:fill-color="#156082" draw:opacity="100%" draw:stroke="solid" svg:stroke-width="0.02778in" svg:stroke-color="#0c445e" svg:stroke-opacity="100%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d424d" style:text-line-through-type="none" style:text-line-through-style="none" style:text-line-through-width="auto" style:text-line-through-color="font-color" style:text-position="0% 100%" fo:font-family="Rubi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3d424d" style:text-line-through-type="none" style:text-line-through-style="none" style:text-line-through-width="auto" style:text-line-through-color="font-color" style:text-position="0% 100%" fo:font-family="Rubi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3d424d" style:text-line-through-type="none" style:text-line-through-style="none" style:text-line-through-width="auto" style:text-line-through-color="font-color" style:text-position="0% 100%" fo:font-family="Rubi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3d424d" style:text-line-through-type="none" style:text-line-through-style="none" style:text-line-through-width="auto" style:text-line-through-color="font-color" style:text-position="0% 100%" fo:font-family="Rubi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9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draw:fill="solid" draw:fill-color="#156082" draw:opacity="100%" draw:stroke="solid" svg:stroke-width="0.02778in" svg:stroke-color="#0c445e" svg:stroke-opacity="100%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3d424d" style:text-line-through-type="none" style:text-line-through-style="none" style:text-line-through-width="auto" style:text-line-through-color="font-color" style:text-position="0% 100%" fo:font-family="Rubi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9" style:parent-style-name="Graphics">
      <style:graphic-properties draw:fill="none" fo:clip="rect(0in, 0in, 0in, 0in)" draw:stroke="non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solid" draw:fill-color="#156082" draw:opacity="100%" draw:stroke="solid" svg:stroke-width="0.02778in" svg:stroke-color="#0c445e" svg:stroke-opacity="100%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solid" draw:fill-color="#156082" draw:opacity="100%" draw:stroke="solid" svg:stroke-width="0.02778in" svg:stroke-color="#0c445e" svg:stroke-opacity="100%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272f3d" style:text-line-through-type="none" style:text-line-through-style="none" style:text-line-through-width="auto" style:text-line-through-color="font-color" style:text-position="0% 100%" fo:font-family="Rostelecom Basi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9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solid" draw:fill-color="#156082" draw:opacity="100%" draw:stroke="solid" svg:stroke-width="0.02778in" svg:stroke-color="#0c445e" svg:stroke-opacity="100%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100%" fo:text-align="center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3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8">
      <text:list-level-style-bullet text:level="1" text:bullet-char="■">
        <style:list-level-properties text:space-before="0in"/>
        <style:text-properties fo:color="#272f3d" fo:font-family="Franklin Gothic Book" style:font-family-generic="swiss" fo:font-size="45%"/>
      </text:list-level-style-bullet>
      <text:list-level-style-bullet text:level="2" text:bullet-char="■">
        <style:list-level-properties text:space-before="0.75in"/>
        <style:text-properties fo:color="#272f3d" fo:font-family="Franklin Gothic Book" style:font-family-generic="swiss" fo:font-size="45%"/>
      </text:list-level-style-bullet>
      <text:list-level-style-bullet text:level="3" text:bullet-char="■">
        <style:list-level-properties text:space-before="1.25in"/>
        <style:text-properties fo:color="#272f3d" fo:font-family="Franklin Gothic Book" style:font-family-generic="swiss" fo:font-size="45%"/>
      </text:list-level-style-bullet>
      <text:list-level-style-bullet text:level="4" text:bullet-char="■">
        <style:list-level-properties text:space-before="1.75in"/>
        <style:text-properties fo:color="#272f3d" fo:font-family="Franklin Gothic Book" style:font-family-generic="swiss" fo:font-size="45%"/>
      </text:list-level-style-bullet>
      <text:list-level-style-bullet text:level="5" text:bullet-char="■">
        <style:list-level-properties text:space-before="2.25in"/>
        <style:text-properties fo:color="#272f3d" fo:font-family="Franklin Gothic Book" style:font-family-generic="swiss" fo:font-size="45%"/>
      </text:list-level-style-bullet>
      <text:list-level-style-bullet text:level="6" text:bullet-char="■">
        <style:list-level-properties text:space-before="2.75in"/>
        <style:text-properties fo:color="#272f3d" fo:font-family="Franklin Gothic Book" style:font-family-generic="swiss" fo:font-size="45%"/>
      </text:list-level-style-bullet>
      <text:list-level-style-bullet text:level="7" text:bullet-char="■">
        <style:list-level-properties text:space-before="3.25in"/>
        <style:text-properties fo:color="#272f3d" fo:font-family="Franklin Gothic Book" style:font-family-generic="swiss" fo:font-size="45%"/>
      </text:list-level-style-bullet>
      <text:list-level-style-bullet text:level="8" text:bullet-char="■">
        <style:list-level-properties text:space-before="3.75in"/>
        <style:text-properties fo:color="#272f3d" fo:font-family="Franklin Gothic Book" style:font-family-generic="swiss" fo:font-size="45%"/>
      </text:list-level-style-bullet>
      <text:list-level-style-bullet text:level="9" text:bullet-char="■">
        <style:list-level-properties text:space-before="4.25in"/>
        <style:text-properties fo:color="#272f3d" fo:font-family="Franklin Gothic Book" style:font-family-generic="swiss" fo:font-size="45%"/>
      </text:list-level-style-bullet>
    </text:list-style>
    <text:list-style style:name="a116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255">
      <text:list-level-style-number text:level="1" style:num-format="1" style:num-suffix=".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.25in" text:min-label-width="0.5625in"/>
        <style:text-properties fo:font-size="100%"/>
      </text:list-level-style-number>
    </text:list-style>
    <text:list-style style:name="a1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2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135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8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1">
      <text:list-level-style-bullet text:level="1" text:bullet-char="■">
        <style:list-level-properties text:space-before="0in"/>
        <style:text-properties fo:color="#272f3d" fo:font-family="Franklin Gothic Book" style:font-family-generic="swiss" fo:font-size="45%"/>
      </text:list-level-style-bullet>
      <text:list-level-style-bullet text:level="2" text:bullet-char="■">
        <style:list-level-properties text:space-before="0.75in"/>
        <style:text-properties fo:color="#272f3d" fo:font-family="Franklin Gothic Book" style:font-family-generic="swiss" fo:font-size="45%"/>
      </text:list-level-style-bullet>
      <text:list-level-style-bullet text:level="3" text:bullet-char="■">
        <style:list-level-properties text:space-before="1.25in"/>
        <style:text-properties fo:color="#272f3d" fo:font-family="Franklin Gothic Book" style:font-family-generic="swiss" fo:font-size="45%"/>
      </text:list-level-style-bullet>
      <text:list-level-style-bullet text:level="4" text:bullet-char="■">
        <style:list-level-properties text:space-before="1.75in"/>
        <style:text-properties fo:color="#272f3d" fo:font-family="Franklin Gothic Book" style:font-family-generic="swiss" fo:font-size="45%"/>
      </text:list-level-style-bullet>
      <text:list-level-style-bullet text:level="5" text:bullet-char="■">
        <style:list-level-properties text:space-before="2.25in"/>
        <style:text-properties fo:color="#272f3d" fo:font-family="Franklin Gothic Book" style:font-family-generic="swiss" fo:font-size="45%"/>
      </text:list-level-style-bullet>
      <text:list-level-style-bullet text:level="6" text:bullet-char="■">
        <style:list-level-properties text:space-before="2.75in"/>
        <style:text-properties fo:color="#272f3d" fo:font-family="Franklin Gothic Book" style:font-family-generic="swiss" fo:font-size="45%"/>
      </text:list-level-style-bullet>
      <text:list-level-style-bullet text:level="7" text:bullet-char="■">
        <style:list-level-properties text:space-before="3.25in"/>
        <style:text-properties fo:color="#272f3d" fo:font-family="Franklin Gothic Book" style:font-family-generic="swiss" fo:font-size="45%"/>
      </text:list-level-style-bullet>
      <text:list-level-style-bullet text:level="8" text:bullet-char="■">
        <style:list-level-properties text:space-before="3.75in"/>
        <style:text-properties fo:color="#272f3d" fo:font-family="Franklin Gothic Book" style:font-family-generic="swiss" fo:font-size="45%"/>
      </text:list-level-style-bullet>
      <text:list-level-style-bullet text:level="9" text:bullet-char="■">
        <style:list-level-properties text:space-before="4.25in"/>
        <style:text-properties fo:color="#272f3d" fo:font-family="Franklin Gothic Book" style:font-family-generic="swiss" fo:font-size="45%"/>
      </text:list-level-style-bullet>
    </text:list-style>
    <text:list-style style:name="a1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064">
      <text:list-level-style-bullet text:level="1" text:bullet-char="■">
        <style:list-level-properties text:space-before="0in"/>
        <style:text-properties fo:color="#272f3d" fo:font-family="Franklin Gothic Book" style:font-family-generic="swiss" fo:font-size="45%"/>
      </text:list-level-style-bullet>
      <text:list-level-style-bullet text:level="2" text:bullet-char="■">
        <style:list-level-properties text:space-before="0.75in"/>
        <style:text-properties fo:color="#272f3d" fo:font-family="Franklin Gothic Book" style:font-family-generic="swiss" fo:font-size="45%"/>
      </text:list-level-style-bullet>
      <text:list-level-style-bullet text:level="3" text:bullet-char="■">
        <style:list-level-properties text:space-before="1.25in"/>
        <style:text-properties fo:color="#272f3d" fo:font-family="Franklin Gothic Book" style:font-family-generic="swiss" fo:font-size="45%"/>
      </text:list-level-style-bullet>
      <text:list-level-style-bullet text:level="4" text:bullet-char="■">
        <style:list-level-properties text:space-before="1.75in"/>
        <style:text-properties fo:color="#272f3d" fo:font-family="Franklin Gothic Book" style:font-family-generic="swiss" fo:font-size="45%"/>
      </text:list-level-style-bullet>
      <text:list-level-style-bullet text:level="5" text:bullet-char="■">
        <style:list-level-properties text:space-before="2.25in"/>
        <style:text-properties fo:color="#272f3d" fo:font-family="Franklin Gothic Book" style:font-family-generic="swiss" fo:font-size="45%"/>
      </text:list-level-style-bullet>
      <text:list-level-style-bullet text:level="6" text:bullet-char="■">
        <style:list-level-properties text:space-before="2.75in"/>
        <style:text-properties fo:color="#272f3d" fo:font-family="Franklin Gothic Book" style:font-family-generic="swiss" fo:font-size="45%"/>
      </text:list-level-style-bullet>
      <text:list-level-style-bullet text:level="7" text:bullet-char="■">
        <style:list-level-properties text:space-before="3.25in"/>
        <style:text-properties fo:color="#272f3d" fo:font-family="Franklin Gothic Book" style:font-family-generic="swiss" fo:font-size="45%"/>
      </text:list-level-style-bullet>
      <text:list-level-style-bullet text:level="8" text:bullet-char="■">
        <style:list-level-properties text:space-before="3.75in"/>
        <style:text-properties fo:color="#272f3d" fo:font-family="Franklin Gothic Book" style:font-family-generic="swiss" fo:font-size="45%"/>
      </text:list-level-style-bullet>
      <text:list-level-style-bullet text:level="9" text:bullet-char="■">
        <style:list-level-properties text:space-before="4.25in"/>
        <style:text-properties fo:color="#272f3d" fo:font-family="Franklin Gothic Book" style:font-family-generic="swiss" fo:font-size="45%"/>
      </text:list-level-style-bullet>
    </text:list-style>
    <text:list-style style:name="a1260">
      <text:list-level-style-number text:level="1" style:num-format="1" style:num-suffix=".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.25in" text:min-label-width="0.5625in"/>
        <style:text-properties fo:font-size="100%"/>
      </text:list-level-style-number>
    </text:list-style>
    <text:list-style style:name="a1067">
      <text:list-level-style-bullet text:level="1" text:bullet-char="■">
        <style:list-level-properties text:space-before="0in"/>
        <style:text-properties fo:color="#272f3d" fo:font-family="Franklin Gothic Book" style:font-family-generic="swiss" fo:font-size="45%"/>
      </text:list-level-style-bullet>
      <text:list-level-style-bullet text:level="2" text:bullet-char="■">
        <style:list-level-properties text:space-before="0.75in"/>
        <style:text-properties fo:color="#272f3d" fo:font-family="Franklin Gothic Book" style:font-family-generic="swiss" fo:font-size="45%"/>
      </text:list-level-style-bullet>
      <text:list-level-style-bullet text:level="3" text:bullet-char="■">
        <style:list-level-properties text:space-before="1.25in"/>
        <style:text-properties fo:color="#272f3d" fo:font-family="Franklin Gothic Book" style:font-family-generic="swiss" fo:font-size="45%"/>
      </text:list-level-style-bullet>
      <text:list-level-style-bullet text:level="4" text:bullet-char="■">
        <style:list-level-properties text:space-before="1.75in"/>
        <style:text-properties fo:color="#272f3d" fo:font-family="Franklin Gothic Book" style:font-family-generic="swiss" fo:font-size="45%"/>
      </text:list-level-style-bullet>
      <text:list-level-style-bullet text:level="5" text:bullet-char="■">
        <style:list-level-properties text:space-before="2.25in"/>
        <style:text-properties fo:color="#272f3d" fo:font-family="Franklin Gothic Book" style:font-family-generic="swiss" fo:font-size="45%"/>
      </text:list-level-style-bullet>
      <text:list-level-style-bullet text:level="6" text:bullet-char="■">
        <style:list-level-properties text:space-before="2.75in"/>
        <style:text-properties fo:color="#272f3d" fo:font-family="Franklin Gothic Book" style:font-family-generic="swiss" fo:font-size="45%"/>
      </text:list-level-style-bullet>
      <text:list-level-style-bullet text:level="7" text:bullet-char="■">
        <style:list-level-properties text:space-before="3.25in"/>
        <style:text-properties fo:color="#272f3d" fo:font-family="Franklin Gothic Book" style:font-family-generic="swiss" fo:font-size="45%"/>
      </text:list-level-style-bullet>
      <text:list-level-style-bullet text:level="8" text:bullet-char="■">
        <style:list-level-properties text:space-before="3.75in"/>
        <style:text-properties fo:color="#272f3d" fo:font-family="Franklin Gothic Book" style:font-family-generic="swiss" fo:font-size="45%"/>
      </text:list-level-style-bullet>
      <text:list-level-style-bullet text:level="9" text:bullet-char="■">
        <style:list-level-properties text:space-before="4.25in"/>
        <style:text-properties fo:color="#272f3d" fo:font-family="Franklin Gothic Book" style:font-family-generic="swiss" fo:font-size="45%"/>
      </text:list-level-style-bullet>
    </text:list-style>
    <text:list-style style:name="a1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сознание,&#10;Мировоззрение,&#10;мышление" draw:style-name="a983" draw:master-page-name="Master1-Layout7-blank-Пустой-слайд" presentation:presentation-page-layout-name="Master1-PPL7" draw:id="Slide-256">
        <draw:frame draw:id="id124" presentation:style-name="a986" draw:name="PlaceHolder 1" svg:x="2.28189in" svg:y="3.93701in" svg:width="9.14331in" svg:height="2.2937in" presentation:class="title" presentation:placeholder="false">
          <draw:text-box>
            <text:p text:style-name="a985" text:class-names="" text:cond-style-name=""><text:span text:style-name="a984" text:class-names="">Социальная стратификация <text:line-break/>и<text:line-break/>социальная мобильность</text:span></text:p>
          </draw:text-box>
          <svg:title/>
          <svg:desc/>
        </draw:frame>
        <presentation:notes draw:style-name="a992">
          <draw:frame draw:id="id125" draw:style-name="a989" draw:name="Номер слайда 6" svg:x="4.67953in" svg:y="11.10827in" svg:width="3.5878in" svg:height="0.58425in">
            <draw:text-box>
              <text:p text:style-name="a988" text:class-names="" text:cond-style-name=""><text:span text:style-name="a98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26" presentation:style-name="a990" draw:name="Образ слайда 1">
            <svg:title/>
            <svg:desc/>
          </draw:page-thumbnail>
          <draw:frame draw:id="id127" presentation:style-name="a99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93" draw:master-page-name="Master2-Layout7-blank-Пустой-слайд" presentation:presentation-page-layout-name="Master2-PPL7" draw:id="Slide-257">
        <draw:frame draw:id="id128" presentation:style-name="a996" draw:name="Заголовок 1" svg:x="0.66654in" svg:y="0.29921in" svg:width="11.99961in" svg:height="1.25197in" presentation:class="title" presentation:placeholder="false">
          <draw:text-box>
            <text:p text:style-name="a995" text:class-names="" text:cond-style-name=""><text:span text:style-name="a994" text:class-names="">Стратификация общества</text:span></text:p>
          </draw:text-box>
          <svg:title/>
          <svg:desc/>
        </draw:frame>
        <draw:frame draw:id="id129" presentation:style-name="a1000" draw:name="Текст 2" svg:x="1.06024in" svg:y="1.75472in" svg:width="5.85551in" svg:height="4.98465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Стра́та социа́льная (от лат. stratum — «слой, пласт») — элемент социальной структуры (социальный слой или группа), объединённый неким общим признаком (имущественным, профессиональным или иным).</text:span></text:p>
              </text:list-item>
            </text:list>
          </draw:text-box>
          <svg:title/>
          <svg:desc/>
        </draw:frame>
        <draw:frame draw:id="id130" presentation:style-name="a1001" draw:name="Текст 3" svg:x="6.81496in" svg:y="1.75472in" svg:width="5.85551in" svg:height="4.94961in" presentation:class="outline" presentation:placeholder="true">
          <draw:text-box/>
          <svg:title/>
          <svg:desc/>
        </draw:frame>
        <draw:frame draw:id="id131" draw:style-name="a1002" svg:x="6.91575in" svg:y="1.75472in" svg:width="5.68268in" svg:height="5.1598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08">
          <draw:frame draw:id="id132" draw:style-name="a1005" draw:name="Номер слайда 6" svg:x="4.67953in" svg:y="11.10827in" svg:width="3.5878in" svg:height="0.58425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33" presentation:style-name="a1006" draw:name="Образ слайда 1">
            <svg:title/>
            <svg:desc/>
          </draw:page-thumbnail>
          <draw:frame draw:id="id134" presentation:style-name="a100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09" draw:master-page-name="Master2-Layout7-blank-Пустой-слайд" presentation:presentation-page-layout-name="Master2-PPL7" draw:id="Slide-258">
        <draw:frame draw:id="id135" presentation:style-name="a1012" draw:name="PlaceHolder 1" svg:x="1.73228in" svg:y="1.57205in" svg:width="10.49921in" svg:height="1.30118in" presentation:class="title" presentation:placeholder="false">
          <draw:text-box>
            <text:p text:style-name="a1011" text:class-names="" text:cond-style-name=""><text:span text:style-name="a1010" text:class-names="">Формально выделяют 2 модели социального расслоения: пирамиду и ромб.</text:span></text:p>
          </draw:text-box>
          <svg:title/>
          <svg:desc/>
        </draw:frame>
        <presentation:notes draw:style-name="a1018">
          <draw:frame draw:id="id136" draw:style-name="a1015" draw:name="Номер слайда 6" svg:x="4.67953in" svg:y="11.10827in" svg:width="3.5878in" svg:height="0.58425in">
            <draw:text-box>
              <text:p text:style-name="a1014" text:class-names="" text:cond-style-name=""><text:span text:style-name="a101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37" presentation:style-name="a1016" draw:name="Образ слайда 1">
            <svg:title/>
            <svg:desc/>
          </draw:page-thumbnail>
          <draw:frame draw:id="id138" presentation:style-name="a101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Подходы" draw:style-name="a1019" draw:master-page-name="Master2-Layout7-blank-Пустой-слайд" presentation:presentation-page-layout-name="Master2-PPL7" draw:id="Slide-259">
        <draw:frame draw:id="id139" presentation:style-name="a1020" draw:name="PlaceHolder 1" svg:x="1.5in" svg:y="0.75in" svg:width="10.49921in" svg:height="1.62441in" presentation:class="title" presentation:placeholder="true">
          <draw:text-box/>
          <svg:title/>
          <svg:desc/>
        </draw:frame>
        <draw:frame draw:id="id140" draw:style-name="a1021" svg:x="1.5748in" svg:y="0.75in" svg:width="10.70866in" svg:height="6.2578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27">
          <draw:frame draw:id="id141" draw:style-name="a1024" draw:name="Номер слайда 6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42" presentation:style-name="a1025" draw:name="Образ слайда 1">
            <svg:title/>
            <svg:desc/>
          </draw:page-thumbnail>
          <draw:frame draw:id="id143" presentation:style-name="a10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Крайний материализм (физикализм) " draw:style-name="a1028" draw:master-page-name="Master2-Layout7-blank-Пустой-слайд" presentation:presentation-page-layout-name="Master2-PPL7" draw:id="Slide-260">
        <draw:frame draw:id="id144" presentation:style-name="a1029" draw:name="PlaceHolder 1" svg:x="1.5in" svg:y="0.3752in" svg:width="10.49921in" svg:height="1.62441in" presentation:class="title" presentation:placeholder="true">
          <draw:text-box/>
          <svg:title/>
          <svg:desc/>
        </draw:frame>
        <draw:frame draw:id="id145" draw:style-name="a1030" svg:x="3.46457in" svg:y="0.48661in" svg:width="7.24409in" svg:height="6.8362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36">
          <draw:frame draw:id="id146" draw:style-name="a1033" draw:name="Номер слайда 6" svg:x="4.67953in" svg:y="11.10827in" svg:width="3.5878in" svg:height="0.5842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47" presentation:style-name="a1034" draw:name="Образ слайда 1">
            <svg:title/>
            <svg:desc/>
          </draw:page-thumbnail>
          <draw:frame draw:id="id148" presentation:style-name="a103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Умеренный материализм. " draw:style-name="a1037" draw:master-page-name="Master2-Layout7-blank-Пустой-слайд" presentation:presentation-page-layout-name="Master2-PPL7" draw:id="Slide-261">
        <draw:frame draw:id="id149" presentation:style-name="a1040" draw:name="PlaceHolder 1" svg:x="1.5in" svg:y="0.75in" svg:width="10.49921in" svg:height="1.62441in" presentation:class="title" presentation:placeholder="false">
          <draw:text-box>
            <text:p text:style-name="a1039" text:class-names="" text:cond-style-name=""><text:span text:style-name="a1038" text:class-names="">Типы профиля стратификации в разных по уровню развития странах</text:span></text:p>
          </draw:text-box>
          <svg:title/>
          <svg:desc/>
        </draw:frame>
        <draw:frame draw:id="id150" presentation:style-name="a1041" draw:name="PlaceHolder 2" svg:x="1.5in" svg:y="2.5in" svg:width="10.49921in" svg:height="3.91575in" presentation:class="outline" presentation:placeholder="true">
          <draw:text-box/>
          <svg:title/>
          <svg:desc/>
        </draw:frame>
        <draw:frame draw:id="id151" draw:style-name="a1042" svg:x="2.40236in" svg:y="2.20472in" svg:width="8.22756in" svg:height="4.6893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48">
          <draw:frame draw:id="id152" draw:style-name="a1045" draw:name="Номер слайда 6" svg:x="4.67953in" svg:y="11.10827in" svg:width="3.5878in" svg:height="0.58425in">
            <draw:text-box>
              <text:p text:style-name="a1044" text:class-names="" text:cond-style-name=""><text:span text:style-name="a104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53" presentation:style-name="a1046" draw:name="Образ слайда 1">
            <svg:title/>
            <svg:desc/>
          </draw:page-thumbnail>
          <draw:frame draw:id="id154" presentation:style-name="a104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Основными функциями сознания считаются:&#10;" draw:style-name="a1049" draw:master-page-name="Master2-Layout7-blank-Пустой-слайд" presentation:presentation-page-layout-name="Master2-PPL7" draw:id="Slide-263">
        <draw:frame draw:id="id155" presentation:style-name="a1052" draw:name="PlaceHolder 1" svg:x="1.70157in" svg:y="0.3937in" svg:width="10.49921in" svg:height="0.74606in" presentation:class="title" presentation:placeholder="false">
          <draw:text-box>
            <text:p text:style-name="a1051" text:class-names="" text:cond-style-name=""><text:span text:style-name="a1050" text:class-names="">Исторические типы стратификационных систем</text:span></text:p>
          </draw:text-box>
          <svg:title/>
          <svg:desc/>
        </draw:frame>
        <draw:frame draw:id="id156" presentation:style-name="a1068" draw:name="PlaceHolder 2" svg:x="1.41732in" svg:y="1.02362in" svg:width="11.25984in" svg:height="3.91575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Рабство — это единственная в истории форма социальных отношений, когда один человек выступает собственностью другого, лишённый всяких прав и свобод. Форма максимально жёсткого закрепления людей в низших стратах.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Каста — социальная группа, членством в которой человек обязан исключительно своему рождению. Существует детальная регламентация в деятельности каждой касты.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Сословие — социальная группа, обладающая правами и обязанностями, закреплёнными обычаем или юридическим законом и передаваемыми по наследству. Права и обязанности каждого сословия определяются законом и освящаются религией.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Класс — большая социальная группа, различающаяся по её роли во всех сферах жизнедеятельности общества, которая формируется и функционирует на основе коренных социальных интересов. Принадлежность к классам не регламентируется властями, не устанавливается законодательно и не передаётся по наследству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presentation:notes draw:style-name="a1074">
          <draw:frame draw:id="id157" draw:style-name="a1071" draw:name="Номер слайда 6" svg:x="4.67953in" svg:y="11.10827in" svg:width="3.5878in" svg:height="0.58425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58" presentation:style-name="a1072" draw:name="Образ слайда 1">
            <svg:title/>
            <svg:desc/>
          </draw:page-thumbnail>
          <draw:frame draw:id="id159" presentation:style-name="a107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Структура сознания" draw:style-name="a1075" draw:master-page-name="Master2-Layout7-blank-Пустой-слайд" presentation:presentation-page-layout-name="Master2-PPL7" draw:id="Slide-264">
        <draw:frame draw:id="id160" presentation:style-name="a1078" draw:name="PlaceHolder 1" svg:x="1.5in" svg:y="0.75in" svg:width="10.49921in" svg:height="1.62441in" presentation:class="title" presentation:placeholder="false">
          <draw:text-box>
            <text:p text:style-name="a1077" text:class-names="" text:cond-style-name=""><text:span text:style-name="a1076" text:class-names="">Критерии стратификации</text:span></text:p>
          </draw:text-box>
          <svg:title/>
          <svg:desc/>
        </draw:frame>
        <draw:frame draw:id="id161" draw:style-name="a1097" draw:name="TextBox 3" svg:x="1.33412in" svg:y="1.579in" svg:width="11.37518in" svg:height="5.75566in">
          <draw:text-box>
            <text:p text:style-name="a1080" text:class-names="" text:cond-style-name=""><text:span text:style-name="a1079" text:class-names="">Пять основных критериев социальной стратификации:</text:span></text:p>
            <text:p text:style-name="a1082" text:class-names="" text:cond-style-name=""><text:span text:style-name="a1081" text:class-names=""/></text:p>
            <text:p text:style-name="a1084" text:class-names="" text:cond-style-name=""><text:span text:style-name="a1083" text:class-names="">Доход — количество финансовых поступлений за определенный период (месяц, год).Богатство — накопленные доходы.</text:span></text:p>
            <text:p text:style-name="a1086" text:class-names="" text:cond-style-name=""><text:span text:style-name="a1085" text:class-names=""/></text:p>
            <text:p text:style-name="a1088" text:class-names="" text:cond-style-name=""><text:span text:style-name="a1087" text:class-names="">Власть — способность и возможность осуществлять свою волю, оказывать влияние на деятельность других людей с помощью авторитета, права, насилия и других методов.</text:span></text:p>
            <text:p text:style-name="a1090" text:class-names="" text:cond-style-name=""><text:span text:style-name="a1089" text:class-names=""/></text:p>
            <text:p text:style-name="a1092" text:class-names="" text:cond-style-name=""><text:span text:style-name="a1091" text:class-names="">Образование — знания, умения и навыки, которые освоены в процессе обучения.</text:span></text:p>
            <text:p text:style-name="a1094" text:class-names="" text:cond-style-name=""><text:span text:style-name="a1093" text:class-names=""/></text:p>
            <text:p text:style-name="a1096" text:class-names="" text:cond-style-name=""><text:span text:style-name="a1095" text:class-names="">Престиж — общественная оценка привлекательности, значимости профессии, должности, увлечений.</text:span></text:p>
          </draw:text-box>
          <svg:title/>
          <svg:desc/>
        </draw:frame>
        <presentation:notes draw:style-name="a1103">
          <draw:frame draw:id="id162" draw:style-name="a1100" draw:name="Номер слайда 6" svg:x="4.67953in" svg:y="11.10827in" svg:width="3.5878in" svg:height="0.58425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63" presentation:style-name="a1101" draw:name="Образ слайда 1">
            <svg:title/>
            <svg:desc/>
          </draw:page-thumbnail>
          <draw:frame draw:id="id164" presentation:style-name="a110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04" draw:master-page-name="Master2-Layout3-secHead-Заголовок-раздела" presentation:presentation-page-layout-name="Master2-PPL3" draw:id="Slide-265">
        <draw:frame draw:id="id165" presentation:style-name="a1107" draw:name="PlaceHolder 1" svg:x="0.82833in" svg:y="0.36979in" svg:width="11.5in" svg:height="2.11111in" presentation:class="title" presentation:placeholder="false">
          <draw:text-box>
            <text:p text:style-name="a1106" text:class-names="" text:cond-style-name=""><text:span text:style-name="a1105" text:class-names="">Положение человека в обществе:</text:span></text:p>
          </draw:text-box>
          <svg:title/>
          <svg:desc/>
        </draw:frame>
        <draw:frame draw:id="id166" presentation:style-name="a1122" draw:name="Текст 2" svg:x="1.03763in" svg:y="2.55814in" svg:width="11.5in" svg:height="4.18605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08" text:class-names="">Социальный статус личности</text:span><text:span text:style-name="a1109" text:class-names=""> — положение человека в обществе, которое он занимает в соответствии со своим возрастом, полом, различиями, профессией, семейным положением. В его положении различают различные факторы: черты характера, умение общаться, образование, финансовые возможности. <text:line-break/><text:line-break/></text:span><text:span text:style-name="a1110" text:class-names="">Социальная роль — это </text:span><text:span text:style-name="a1111" text:class-names=""><text:a xlink:href="https://dictionary.apa.org/social-role" text:style-name="" text:visited-style-name="">набор действий и установок</text:a></text:span><text:span text:style-name="a1112" text:class-names="">, ожидаемых от человека в зависимости от его должности или статуса в обществе. Например, может быть социальная роль супруга, матери, учителя, владельца собаки или волонтера. Каждый человек выполняет несколько таких ролей.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5" text:class-names="">И. Гофман</text:span><text:span text:style-name="a1116" text:class-names=""> считал, что поведение людей определяется, в первую очередь, нормами тех </text:span><text:span text:style-name="a1117" text:class-names="">социальных</text:span><text:span text:style-name="a1118" text:class-names=""> групп, к которым они принадлежат. А поскольку каждый человек относится к разным социальным группам, то и его поведение меняется в зависимости от того, в какой именно он действует в данный момент</text:span><text:span text:style-name="a1119" text:class-names=""/></text:p>
              </text:list-item>
            </text:list>
          </draw:text-box>
          <svg:title/>
          <svg:desc/>
        </draw:frame>
        <presentation:notes draw:style-name="a1128">
          <draw:frame draw:id="id167" draw:style-name="a1125" draw:name="Номер слайда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68" presentation:style-name="a1126" draw:name="Образ слайда 1">
            <svg:title/>
            <svg:desc/>
          </draw:page-thumbnail>
          <draw:frame draw:id="id169" presentation:style-name="a11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4" draw:style-name="a1129" draw:master-page-name="Master2-Layout7-blank-Пустой-слайд" presentation:presentation-page-layout-name="Master2-PPL7" draw:id="Slide-289">
        <draw:frame draw:id="id170" draw:style-name="a1144" draw:name="TextBox 2" svg:x="0.79168in" svg:y="0.08791in" svg:width="12.17343in" svg:height="6.76543in">
          <draw:text-box>
            <text:list text:style-name="a1132">
              <text:list-item>
                <text:p text:style-name="a1131" text:class-names="" text:cond-style-name=""><text:span text:style-name="a1130" text:class-names="">«Статус» в переводе с латыни означает: положение; верность; честь; родство.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2. Какой статус присваивается человеку независимо от его желания? достигнутый; заслуженный; официальный; предписанный.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3. Социальный статус не бывает: главным; неглавным; ролевым; предписанным.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9" text:class-names=""><text:s text:c="1"/>4. Сумма конкретных действий человека, занимающего определённое положение в обществе: поведение; роль; статус; мобильность. 5. Любые изменения в социальном положении индивида или социальной группы: поведение; роль; статус; мобильность. 6. Социальная мобильность, связанная с изменением социального положения без понижения или повышения статуса: горизонтальная; вертикальная; диагональная; профессиональная. 7. По какому критерию выделена социальная группа «горожане, сельчане»? демографический; профессиональный; этносоциальный; территориальный. 8. По профессиональному критерию, в состав социальной группы может входить: молодёжь; учитель; белорус; горожанин. 9. Какой критерий стратификации характеризует уважение к занимаемому человеком социальному положению в общественном мнении? престиж профессии; власть; образование; доход. 10. Как называют способы перемещения в социальной структуре общества? лестницами; лифтами; крыльями; лыжами. 11. Какая сфера общества охватывает повседневную жизнь человека? социальная; бытовая; гражданская; правовая. 12. В … группе люди находятся в непосредственном контакте друг с другом: большой; формальной; малой; патриархальной. 13. Социальные группы с самобытной культурой и нормами, принадлежность к которым определяется рождением человека: касты; страты; сословия; классы. 14. Для какого типа социальной стратификации характерно социальное деление классов по отношению к собственности на ресурсы производства? классовое деление; сословный строй; кастовый строй; рабство. 15. Какое понятие отражает сложившееся в обществе социальное неравенство? социальная группа; социальная структура; социальная роль; социальная стратификация. – материал взят с<text:s text:c="1"/></text:span><text:span text:style-name="a1140" text:class-names="">сайта</text:span><text:span text:style-name="a1141" text:class-names=""/></text:p>
              </text:list-item>
            </text:list>
          </draw:text-box>
          <svg:title/>
          <svg:desc/>
        </draw:frame>
      </draw:page>
      <draw:page draw:name="Slide35" draw:style-name="a1145" draw:master-page-name="Master2-Layout3-secHead-Заголовок-раздела" presentation:presentation-page-layout-name="Master2-PPL3" draw:id="Slide-290">
        <draw:frame draw:id="id171" presentation:style-name="a1148" draw:name="Заголовок 1" svg:x="1.07251in" svg:y="0.19537in" svg:width="11.5in" svg:height="1.0023in" presentation:class="title" presentation:placeholder="false">
          <draw:text-box>
            <text:p text:style-name="a1147" text:class-names="" text:cond-style-name=""><text:span text:style-name="a1146" text:class-names="">Социальная мобильность</text:span></text:p>
          </draw:text-box>
          <svg:title/>
          <svg:desc/>
        </draw:frame>
        <draw:frame draw:id="id172" draw:style-name="a1149" draw:name="Picture 2" svg:x="1.24721in" svg:y="1.40431in" svg:width="11.3253in" svg:height="7.9842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6" draw:style-name="a1150" draw:master-page-name="Master2-Layout1-title-Титульный-слайд" presentation:presentation-page-layout-name="Master2-PPL1" draw:id="Slide-291">
        <draw:frame draw:id="id173" presentation:style-name="a1153" draw:name="Заголовок 1" svg:x="1.66667in" svg:y="1.22743in" svg:width="10in" svg:height="2.61111in" presentation:class="title" presentation:placeholder="false">
          <draw:text-box>
            <text:p text:style-name="a1152" text:class-names="" text:cond-style-name=""><text:span text:style-name="a1151" text:class-names="">Каналы мобильности:<text:line-break/></text:span></text:p>
          </draw:text-box>
          <svg:title/>
          <svg:desc/>
        </draw:frame>
        <draw:frame draw:id="id174" presentation:style-name="a1164" draw:name="Подзаголовок 2" svg:x="1.66667in" svg:y="3.93924in" svg:width="10in" svg:height="1.81076in" presentation:class="subtitle" presentation:placeholder="false">
          <draw:text-box>
            <text:p text:style-name="a1155" text:class-names="" text:cond-style-name=""><text:span text:style-name="a1154" text:class-names="">- Институты (образование, своячество, брак, армия, коммерческие организации, церковь, партийная линяя, искусство.)</text:span></text:p>
            <text:list text:style-name="a1158">
              <text:list-item>
                <text:p text:style-name="a1157" text:class-names="" text:cond-style-name=""><text:span text:style-name="a1156" text:class-names="">Миграция (беженцы, образование, работа, репатриации)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p text:style-name="a1163" text:class-names="" text:cond-style-name=""><text:span text:style-name="a1162" text:class-names=""/></text:p>
          </draw:text-box>
          <svg:title/>
          <svg:desc/>
        </draw:frame>
      </draw:page>
      <draw:page draw:name="Slide37" draw:style-name="a1165" draw:master-page-name="Master2-Layout1-title-Титульный-слайд" presentation:presentation-page-layout-name="Master2-PPL1" draw:id="Slide-292">
        <draw:frame draw:id="id175" presentation:style-name="a1168" draw:name="Заголовок 1" svg:x="1.66667in" svg:y="1.22743in" svg:width="10in" svg:height="2.61111in" presentation:class="title" presentation:placeholder="false">
          <draw:text-box>
            <text:p text:style-name="a1167" text:class-names="" text:cond-style-name=""><text:span text:style-name="a1166" text:class-names="">Социальное неравенство</text:span></text:p>
          </draw:text-box>
          <svg:title/>
          <svg:desc/>
        </draw:frame>
        <draw:frame draw:id="id176" presentation:style-name="a1172" draw:name="Подзаголовок 2" svg:x="1.66667in" svg:y="3.93924in" svg:width="10in" svg:height="1.81076in" presentation:class="subtitle" presentation:placeholder="false">
          <draw:text-box>
            <text:p text:style-name="a1171" text:class-names="" text:cond-style-name=""><text:span text:style-name="a1169" text:class-names="">неравномерное распределение ценимых благ и привилегий в обществе</text:span><text:span text:style-name="a1170" text:class-names=""/></text:p>
          </draw:text-box>
          <svg:title/>
          <svg:desc/>
        </draw:frame>
      </draw:page>
      <draw:page draw:name="Slide38" draw:style-name="a1173" draw:master-page-name="Master2-Layout2-obj-Заголовок-и-объект" presentation:presentation-page-layout-name="Master2-PPL2" draw:id="Slide-293">
        <draw:frame draw:id="id177" presentation:style-name="a1177" draw:name="Заголовок 1" svg:x="0.66654in" svg:y="0.29921in" svg:width="11.99961in" svg:height="1.25197in" presentation:class="title" presentation:placeholder="false">
          <draw:text-box>
            <text:p text:style-name="a1176" text:class-names="" text:cond-style-name=""><text:span text:style-name="a1174" text:class-names="">Коэффициент Джини</text:span><text:span text:style-name="a1175" text:class-names=""/></text:p>
          </draw:text-box>
          <svg:title/>
          <svg:desc/>
        </draw:frame>
        <draw:frame draw:id="id178" presentation:style-name="a1182" draw:name="Объект 2" svg:x="1.2093in" svg:y="1.75472in" svg:width="11.45685in" svg:height="4.9545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8" text:class-names="">Коэффициент Джини (индекс Джини, или «индекс справедливости») — показатель, отражающий степень неравенства в распределении доходов внутри различных групп населения. Коэффициент в 1912 году разработал итальянский статистик Коррадо Джини. Показатель принимает значения от 0 (в случае абсолютного равенства) до 1 (в случае абсолютного неравенства). Рассчитывают коэффициент с помощью формулы с пятью переменными. Преимущества индекса заключаются в его независимости от масштабов исследуемых групп. К недостаткам относят различия в системах сбора данных в разных странах, что затрудняет сравнение. По данным Всемирного банка, лидерами по уровню социального расслоения являются Сейшельские Острова (0,66), ЮАР (0,65) и Коморские Острова (0,64). В лидерах по равенству доходов — Норвегия, Словакия и Чехия (по 0,26).</text:span><text:span text:style-name="a1179" text:class-names=""/></text:p>
              </text:list-item>
            </text:list>
          </draw:text-box>
          <svg:title/>
          <svg:desc/>
        </draw:frame>
      </draw:page>
      <draw:page draw:name="Slide39" draw:style-name="a1183" draw:master-page-name="Master2-Layout2-obj-Заголовок-и-объект" presentation:presentation-page-layout-name="Master2-PPL2" draw:id="Slide-294">
        <draw:frame draw:id="id179" presentation:style-name="a1184" draw:name="Заголовок 1" svg:x="0.66654in" svg:y="0.29921in" svg:width="11.99961in" svg:height="1.25197in" presentation:class="title" presentation:placeholder="true">
          <draw:text-box/>
          <svg:title/>
          <svg:desc/>
        </draw:frame>
        <draw:frame draw:id="id180" presentation:style-name="a1185" draw:name="Picture 2" svg:x="1.17442in" svg:y="-0.04171in" svg:width="9.9186in" svg:height="7.71447in" style:rel-width="scale" style:rel-height="scale" presentation:class="graphic" presentation:placeholder="false">
          <draw:image xlink:href="media/image6.jpeg" xlink:type="simple" xlink:show="embed" xlink:actuate="onLoad"/>
          <svg:title/>
          <svg:desc/>
        </draw:frame>
      </draw:page>
      <draw:page draw:name="Slide42" draw:style-name="a1186" draw:master-page-name="Master2-Layout2-obj-Заголовок-и-объект" presentation:presentation-page-layout-name="Master2-PPL2" draw:id="Slide-297">
        <draw:frame draw:id="id181" presentation:style-name="a1187" draw:name="Заголовок 1" svg:x="0.66654in" svg:y="0.29921in" svg:width="11.99961in" svg:height="1.25197in" presentation:class="title" presentation:placeholder="true">
          <draw:text-box/>
          <svg:title/>
          <svg:desc/>
        </draw:frame>
        <draw:frame draw:id="id182" presentation:style-name="a1206" draw:name="Объект 2" svg:x="1.20142in" svg:y="1.6617in" svg:width="11.99961in" svg:height="4.94961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<text:s text:c="1"/>В любой части мира есть неравенство.<text:s text:c="1"/></text:span><text:span text:style-name="a1189" text:class-names="">Сегодня неравенство устроено как матрешка: 10% всегда богаче, чем 90%. Внутри этих 10% у 1% гораздо больше преимуществ, чем у 9%. Внутри этого 1 процента есть небольшой круг людей, у которых есть все.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192" text:class-names="">Это</text:span><text:span text:style-name="a1193" text:class-names=""><text:s text:c="1"/></text:span><text:span text:style-name="a1194" text:class-names="">справедливо</text:span><text:span text:style-name="a1195" text:class-names=""><text:s text:c="1"/></text:span><text:span text:style-name="a1196" text:class-names="">на</text:span><text:span text:style-name="a1197" text:class-names=""><text:s text:c="1"/></text:span><text:span text:style-name="a1198" text:class-names="">любое</text:span><text:span text:style-name="a1199" text:class-names=""><text:s text:c="1"/></text:span><text:span text:style-name="a1200" text:class-names="">неравенство. Например, территориальное неравенство характерно концентрацией ресурсов в больших городах. Которые тоже внутри разделены.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</draw:text-box>
          <svg:title/>
          <svg:desc/>
        </draw:frame>
      </draw:page>
      <draw:page draw:name="Slide43" draw:style-name="a1207" draw:master-page-name="Master2-Layout2-obj-Заголовок-и-объект" presentation:presentation-page-layout-name="Master2-PPL2" draw:id="Slide-298">
        <draw:frame draw:id="id183" presentation:style-name="a1211" draw:name="Заголовок 1" svg:x="0.66654in" svg:y="0.29921in" svg:width="11.99961in" svg:height="1.25197in" presentation:class="title" presentation:placeholder="false">
          <draw:text-box>
            <text:p text:style-name="a1210" text:class-names="" text:cond-style-name=""><text:span text:style-name="a1208" text:class-names="">В России</text:span><text:span text:style-name="a1209" text:class-names=""/></text:p>
          </draw:text-box>
          <svg:title/>
          <svg:desc/>
        </draw:frame>
        <draw:frame draw:id="id184" presentation:style-name="a1234" draw:name="Объект 2" svg:x="0.66654in" svg:y="1.75472in" svg:width="11.99961in" svg:height="4.94961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2" text:class-names="">Разделение</text:span><text:span text:style-name="a1213" text:class-names=""><text:s text:c="1"/></text:span><text:span text:style-name="a1214" text:class-names="">по</text:span><text:span text:style-name="a1215" text:class-names=""><text:s text:c="1"/></text:span><text:span text:style-name="a1216" text:class-names="">доходам:</text:span><text:span text:style-name="a1217" text:class-names=""><text:s text:c="1"/></text:span><text:span text:style-name="a1218" text:class-names="">10% человек получают 46% дохода в стране. 1% - 20% дохода страны (=в США)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1" text:class-names="">Разделение</text:span><text:span text:style-name="a1222" text:class-names=""><text:s text:c="1"/></text:span><text:span text:style-name="a1223" text:class-names="">по</text:span><text:span text:style-name="a1224" text:class-names=""><text:s text:c="1"/></text:span><text:span text:style-name="a1225" text:class-names="">богатству:</text:span><text:span text:style-name="a1226" text:class-names=""><text:s text:c="1"/></text:span><text:span text:style-name="a1227" text:class-names=""><text:s text:c="1"/>10% людей имеют 56% богатства. У 1% - 30% богатства (за 2022 год)</text:span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</draw:page>
      <draw:page draw:name="Slide40" draw:style-name="a1235" draw:master-page-name="Master2-Layout2-obj-Заголовок-и-объект" presentation:presentation-page-layout-name="Master2-PPL2" draw:id="Slide-295">
        <draw:frame draw:id="id185" presentation:style-name="a1238" draw:name="Заголовок 1" svg:x="0.66654in" svg:y="0.29921in" svg:width="11.99961in" svg:height="1.25197in" presentation:class="title" presentation:placeholder="false">
          <draw:text-box>
            <text:p text:style-name="a1237" text:class-names="" text:cond-style-name=""><text:span text:style-name="a1236" text:class-names="">Обсуждение</text:span></text:p>
          </draw:text-box>
          <svg:title/>
          <svg:desc/>
        </draw:frame>
        <draw:frame draw:id="id186" presentation:style-name="a1246" draw:name="Объект 2" svg:x="1.31395in" svg:y="1.75472in" svg:width="11.3522in" svg:height="4.87319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Социальное неравенство – это хорошо или плохо?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Например, б</text:span><text:span text:style-name="a1243" text:class-names="">ританский философ и политик Джон Локк в своем известном труде «Два трактата о правлении» полемизировал с политическим философом сэром Робертом Филмером, утверждавшим, что монархическая власть и неравенство имеют божественное происхождение. Дж. Локк, опираясь на текст «Бытия» Ветхого Завета, утверждал, что с момента сотворения мира власть в нём никогда не была единоличной. Тем самым он выдвинул принцип «естественных, дарованных свыше (Богом – Н.О.) прав человека», таких как право на жизнь, свободу и собственность и доказал, что у человека есть естественная свобода: «Все, у кого одинаковые природа, умственные и физические способности, по природе равны и должны пользоваться теми же общими правами и привилегиями»3 , – писал ученый.</text:span></text:p>
              </text:list-item>
            </text:list>
          </draw:text-box>
          <svg:title/>
          <svg:desc/>
        </draw:frame>
      </draw:page>
      <draw:page draw:name="Slide41" draw:style-name="a1247" draw:master-page-name="Master2-Layout2-obj-Заголовок-и-объект" presentation:presentation-page-layout-name="Master2-PPL2" draw:id="Slide-296">
        <draw:frame draw:id="id187" presentation:style-name="a1250" draw:name="Заголовок 1" svg:x="0.66654in" svg:y="0.29921in" svg:width="11.99961in" svg:height="1.25197in" presentation:class="title" presentation:placeholder="false">
          <draw:text-box>
            <text:p text:style-name="a1249" text:class-names="" text:cond-style-name=""><text:span text:style-name="a1248" text:class-names="">Источники</text:span></text:p>
          </draw:text-box>
          <svg:title/>
          <svg:desc/>
        </draw:frame>
        <draw:frame draw:id="id188" presentation:style-name="a1261" draw:name="Объект 2" svg:x="0.66654in" svg:y="1.75472in" svg:width="11.99961in" svg:height="4.94961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1" text:class-names="">Социальное неравенство в российском обществе: объективное и субъективное измерения,<text:s text:c="1"/></text:span><text:span text:style-name="a1252" text:class-names=""><text:a xlink:href="https://elar.urfu.ru/bitstream/10995/61391/1/978-5-7741-0327-0_056.pdf" text:style-name="" text:visited-style-name="">https://elar.urfu.ru/bitstream/10995/61391/1/978-5-7741-0327-0_056.pdf</text:a></text:span><text:span text:style-name="a1253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6" text:class-names="">СОЦИАЛЬНОЕ НЕРАВЕНСТВО В СОВРЕМЕННОМ МИРЕ: НОВЫЕ ФОРМЫ И ОСОБЕННОСТИ ИХ ПРОЯВЛЕНИЯ В РОССИИ<text:s text:c="1"/></text:span><text:span text:style-name="a1257" text:class-names=""><text:a xlink:href="https://www.socio.msu.ru/documents/Socialnoe_neravenstvo_v_sovremennom_mire.pdf" text:style-name="" text:visited-style-name="">https://www.socio.msu.ru/documents/Socialnoe_neravenstvo_v_sovremennom_mire.pdf</text:a></text:span><text:span text:style-name="a1258" text:class-names="">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</style:presentation-page-layout>
    <style:presentation-page-layout style:name="Master1-PPL2" style:display-name="Заголовок и объект">
      <presentation:placeholder presentation:object="title" svg:x="1.5in" svg:y="0.75in" svg:width="10.49921in" svg:height="1.62441in"/>
      <presentation:placeholder presentation:object="object" svg:x="0.66654in" svg:y="1.75472in" svg:width="11.99961in" svg:height="4.9496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</style:presentation-page-layout>
    <style:presentation-page-layout style:name="Master1-PPL4" style:display-name="Два объекта">
      <presentation:placeholder presentation:object="title" svg:x="1.5in" svg:y="0.75in" svg:width="10.49921in" svg:height="1.62441in"/>
      <presentation:placeholder presentation:object="object" svg:x="0.66667in" svg:y="1.75521in" svg:width="5.91667in" svg:height="4.94965in"/>
      <presentation:placeholder presentation:object="object" svg:x="6.75in" svg:y="1.75521in" svg:width="5.91667in" svg:height="4.94965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</style:presentation-page-layout>
    <style:presentation-page-layout style:name="Master1-PPL6" style:display-name="Только заголовок">
      <presentation:placeholder presentation:object="title" svg:x="1.5in" svg:y="0.75in" svg:width="10.49921in" svg:height="1.62441in"/>
    </style:presentation-page-layout>
    <style:presentation-page-layout style:name="Master1-PPL7" style:display-name="Пустой слайд"/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</style:presentation-page-layout>
    <style:presentation-page-layout style:name="Master1-PPL10" style:display-name="Заголовок и вертикальный текст">
      <presentation:placeholder presentation:object="title" svg:x="1.5in" svg:y="0.75in" svg:width="10.49921in" svg:height="1.62441in"/>
      <presentation:placeholder presentation:object="outline" svg:x="0.66654in" svg:y="1.75472in" svg:width="11.99961in" svg:height="4.94961in"/>
    </style:presentation-page-layout>
    <style:presentation-page-layout style:name="Master1-PPL11" style:display-name="Вертикальный заголовок и текст">
      <presentation:placeholder presentation:object="title" svg:x="9.66667in" svg:y="0.75in" svg:width="3in" svg:height="5.95486in"/>
      <presentation:placeholder presentation:object="outline" svg:x="0.66667in" svg:y="0.75in" svg:width="8.83333in" svg:height="5.95486in"/>
    </style:presentation-page-layout>
    <style:presentation-page-layout style:name="Master2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</style:presentation-page-layout>
    <style:presentation-page-layout style:name="Master2-PPL2" style:display-name="Заголовок и объект">
      <presentation:placeholder presentation:object="title" svg:x="0.66654in" svg:y="0.29921in" svg:width="11.99961in" svg:height="1.25197in"/>
      <presentation:placeholder presentation:object="object" svg:x="0.66654in" svg:y="1.75472in" svg:width="11.99961in" svg:height="4.94961in"/>
    </style:presentation-page-layout>
    <style:presentation-page-layout style:name="Master2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</style:presentation-page-layout>
    <style:presentation-page-layout style:name="Master2-PPL4" style:display-name="Два объекта">
      <presentation:placeholder presentation:object="title" svg:x="0.66654in" svg:y="0.29921in" svg:width="11.99961in" svg:height="1.25197in"/>
      <presentation:placeholder presentation:object="object" svg:x="0.66667in" svg:y="1.75521in" svg:width="5.91667in" svg:height="4.94965in"/>
      <presentation:placeholder presentation:object="object" svg:x="6.75in" svg:y="1.75521in" svg:width="5.91667in" svg:height="4.94965in"/>
    </style:presentation-page-layout>
    <style:presentation-page-layout style:name="Master2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</style:presentation-page-layout>
    <style:presentation-page-layout style:name="Master2-PPL6" style:display-name="Только заголовок">
      <presentation:placeholder presentation:object="title" svg:x="0.66654in" svg:y="0.29921in" svg:width="11.99961in" svg:height="1.25197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</style:presentation-page-layout>
    <style:presentation-page-layout style:name="Master2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</style:presentation-page-layout>
    <style:presentation-page-layout style:name="Master2-PPL10" style:display-name="Заголовок и вертикальный текст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94961in"/>
    </style:presentation-page-layout>
    <style:presentation-page-layout style:name="Master2-PPL11" style:display-name="Вертикальный заголовок и текст">
      <presentation:placeholder presentation:object="title" svg:x="9.66667in" svg:y="0.29861in" svg:width="3in" svg:height="6.40625in"/>
      <presentation:placeholder presentation:object="outline" svg:x="0.66667in" svg:y="0.29861in" svg:width="8.83333in" svg:height="6.4062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26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7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58">
      <style:graphic-properties draw:fill="none" draw:stroke="none"/>
    </style:style>
    <style:style style:family="presentation" style:name="a610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draw:fill="none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draw:stroke="non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none"/>
    </style:style>
    <style:style style:family="paragraph" style:name="a7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13">
      <style:graphic-properties draw:fill="none" draw:stroke="non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draw:fill="none" draw:stroke="non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none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draw:fill="none" draw:stroke="none"/>
    </style:style>
    <style:style style:family="graphic" style:name="a7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draw:fill="none" draw:stroke="none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non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custom-shape svg:x="0.52283in" svg:y="0.00039in" svg:width="0.24921in" svg:height="7.49921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1">
        <svg:title/>
        <svg:desc/>
        <draw:custom-shape svg:x="8.91496in" svg:y="1.8437in" svg:width="3.58071in" svg:height="4.82008in" draw:id="id4" draw:style-name="a25" draw:name="Freeform 6">
          <svg:title/>
          <svg:desc/>
          <text:p text:style-name="a24" text:class-names="" text:cond-style-name=""><text:span text:style-name="a23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5" draw:style-name="a28" draw:name="Freeform 6">
          <svg:title/>
          <svg:desc/>
          <text:p text:style-name="a27" text:class-names="" text:cond-style-name=""><text:span text:style-name="a26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2" presentation:style-name="a6" draw:name="PlaceHolder 1" svg:x="1.5in" svg:y="0.75in" svg:width="10.49921in" svg:height="1.62441in" presentation:class="title" presentation:placeholder="false">
        <draw:text-box>
          <text:p text:style-name="a5" text:class-names="" text:cond-style-name=""><text:span text:style-name="a4" text:class-names="">Для правки текста заголовка щелкните мышью</text:span></text:p>
        </draw:text-box>
        <svg:title/>
        <svg:desc/>
      </draw:frame>
      <draw:frame draw:id="id3" presentation:style-name="a22" draw:name="Текст 6" svg:x="0.66654in" svg:y="1.75472in" svg:width="11.99961in" svg:height="4.94961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Образец текста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Второй уровень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6" presentation:style-name="a29" draw:name="Образ слайда 1">
          <svg:title/>
          <svg:desc/>
        </draw:page-thumbnail>
        <draw:frame draw:id="id7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8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custom-shape svg:x="0.52283in" svg:y="0.00039in" svg:width="0.24921in" svg:height="7.49921in" draw:id="id12" draw:layer="Master1-bg" draw:style-name="a49" draw:name="Rectangle 8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13">
        <svg:title/>
        <svg:desc/>
        <draw:custom-shape svg:x="8.91496in" svg:y="1.8437in" svg:width="3.58071in" svg:height="4.82008in" draw:id="id16" draw:layer="Master1-bg" draw:style-name="a58" draw:name="Freeform 6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17" draw:layer="Master1-bg" draw:style-name="a61" draw:name="Freeform 6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14" presentation:style-name="a52" draw:name="Заголовок 1" svg:x="1.66667in" svg:y="1.22743in" svg:width="10in" svg:height="2.61111in" presentation:class="title" presentation:placeholder="false">
        <draw:text-box>
          <text:p text:style-name="a51" text:class-names="" text:cond-style-name=""><text:span text:style-name="a50" text:class-names="">Образец заголовка</text:span></text:p>
        </draw:text-box>
        <svg:title/>
        <svg:desc/>
      </draw:frame>
      <draw:frame draw:id="id15" presentation:style-name="a55" draw:name="Подзаголовок 2" svg:x="1.66667in" svg:y="3.93924in" svg:width="10in" svg:height="1.81076in" presentation:class="subtitle" presentation:placeholder="false">
        <draw:text-box>
          <text:p text:style-name="a54" text:class-names="" text:cond-style-name=""><text:span text:style-name="a53" text:class-names="">Образец подзаголовка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6" presentation:style-name="a62" draw:name="Образ слайда 1">
          <svg:title/>
          <svg:desc/>
        </draw:page-thumbnail>
        <draw:frame draw:id="id7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8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9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0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1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custom-shape svg:x="0.52283in" svg:y="0.00039in" svg:width="0.24921in" svg:height="7.49921in" draw:id="id18" draw:layer="Master1-bg" draw:style-name="a82" draw:name="Rectangle 8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19">
        <svg:title/>
        <svg:desc/>
        <draw:custom-shape svg:x="8.91496in" svg:y="1.8437in" svg:width="3.58071in" svg:height="4.82008in" draw:id="id22" draw:layer="Master1-bg" draw:style-name="a103" draw:name="Freeform 6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23" draw:layer="Master1-bg" draw:style-name="a106" draw:name="Freeform 6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20" presentation:style-name="a85" draw:name="Заголовок 1" svg:x="1.5in" svg:y="0.75in" svg:width="10.49921in" svg:height="1.62441in" presentation:class="title" presentation:placeholder="false">
        <draw:text-box>
          <text:p text:style-name="a84" text:class-names="" text:cond-style-name=""><text:span text:style-name="a83" text:class-names="">Образец заголовка</text:span></text:p>
        </draw:text-box>
        <svg:title/>
        <svg:desc/>
      </draw:frame>
      <draw:frame draw:id="id21" presentation:style-name="a100" draw:name="Объект 2" svg:x="0.66654in" svg:y="1.75472in" svg:width="11.99961in" svg:height="4.94961in" presentation:class="object" presentation:placeholder="false">
        <draw:text-box>
          <text:p text:style-name="a87" text:class-names="" text:cond-style-name=""><text:span text:style-name="a86" text:class-names="">Образец текста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Второй уровень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6" presentation:style-name="a107" draw:name="Образ слайда 1">
          <svg:title/>
          <svg:desc/>
        </draw:page-thumbnail>
        <draw:frame draw:id="id7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8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9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0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1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custom-shape svg:x="0.52283in" svg:y="0.00039in" svg:width="0.24921in" svg:height="7.49921in" draw:id="id24" draw:layer="Master1-bg" draw:style-name="a127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25">
        <svg:title/>
        <svg:desc/>
        <draw:custom-shape svg:x="8.91496in" svg:y="1.8437in" svg:width="3.58071in" svg:height="4.82008in" draw:id="id28" draw:layer="Master1-bg" draw:style-name="a137" draw:name="Freeform 6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29" draw:layer="Master1-bg" draw:style-name="a140" draw:name="Freeform 6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26" presentation:style-name="a130" draw:name="Заголовок 1" svg:x="0.90972in" svg:y="1.86979in" svg:width="11.5in" svg:height="3.11979in" presentation:class="title" presentation:placeholder="false">
        <draw:text-box>
          <text:p text:style-name="a129" text:class-names="" text:cond-style-name=""><text:span text:style-name="a128" text:class-names="">Образец заголовка</text:span></text:p>
        </draw:text-box>
        <svg:title/>
        <svg:desc/>
      </draw:frame>
      <draw:frame draw:id="id27" presentation:style-name="a134" draw:name="Текст 2" svg:x="0.90972in" svg:y="5.0191in" svg:width="11.5in" svg:height="1.64062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6" presentation:style-name="a141" draw:name="Образ слайда 1">
          <svg:title/>
          <svg:desc/>
        </draw:page-thumbnail>
        <draw:frame draw:id="id7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9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0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custom-shape svg:x="0.52283in" svg:y="0.00039in" svg:width="0.24921in" svg:height="7.49921in" draw:id="id30" draw:layer="Master1-bg" draw:style-name="a161" draw:name="Rectangle 8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31">
        <svg:title/>
        <svg:desc/>
        <draw:custom-shape svg:x="8.91496in" svg:y="1.8437in" svg:width="3.58071in" svg:height="4.82008in" draw:id="id35" draw:layer="Master1-bg" draw:style-name="a197" draw:name="Freeform 6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36" draw:layer="Master1-bg" draw:style-name="a200" draw:name="Freeform 6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32" presentation:style-name="a164" draw:name="Заголовок 1" svg:x="1.5in" svg:y="0.75in" svg:width="10.49921in" svg:height="1.62441in" presentation:class="title" presentation:placeholder="false">
        <draw:text-box>
          <text:p text:style-name="a163" text:class-names="" text:cond-style-name=""><text:span text:style-name="a162" text:class-names="">Образец заголовка</text:span></text:p>
        </draw:text-box>
        <svg:title/>
        <svg:desc/>
      </draw:frame>
      <draw:frame draw:id="id33" presentation:style-name="a179" draw:name="Объект 2" svg:x="0.66667in" svg:y="1.75521in" svg:width="5.91667in" svg:height="4.94965in" presentation:class="object" presentation:placeholder="false">
        <draw:text-box>
          <text:p text:style-name="a166" text:class-names="" text:cond-style-name=""><text:span text:style-name="a165" text:class-names="">Образец текста</text:span></text:p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Второй уровень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4" draw:name="Объект 3" svg:x="6.75in" svg:y="1.75521in" svg:width="5.91667in" svg:height="4.94965in" presentation:class="object" presentation:placeholder="false">
        <draw:text-box>
          <text:p text:style-name="a181" text:class-names="" text:cond-style-name=""><text:span text:style-name="a180" text:class-names="">Образец текста</text:span></text:p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й уровень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6" presentation:style-name="a201" draw:name="Образ слайда 1">
          <svg:title/>
          <svg:desc/>
        </draw:page-thumbnail>
        <draw:frame draw:id="id7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8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9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1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custom-shape svg:x="0.52283in" svg:y="0.00039in" svg:width="0.24921in" svg:height="7.49921in" draw:id="id37" draw:layer="Master1-bg" draw:style-name="a221" draw:name="Rectangl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38">
        <svg:title/>
        <svg:desc/>
        <draw:custom-shape svg:x="8.91496in" svg:y="1.8437in" svg:width="3.58071in" svg:height="4.82008in" draw:id="id44" draw:layer="Master1-bg" draw:style-name="a265" draw:name="Freeform 6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45" draw:layer="Master1-bg" draw:style-name="a268" draw:name="Freeform 6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39" presentation:style-name="a224" draw:name="Заголовок 1" svg:x="0.9184in" svg:y="0.39931in" svg:width="11.5in" svg:height="1.44965in" presentation:class="title" presentation:placeholder="false">
        <draw:text-box>
          <text:p text:style-name="a223" text:class-names="" text:cond-style-name=""><text:span text:style-name="a222" text:class-names="">Образец заголовка</text:span></text:p>
        </draw:text-box>
        <svg:title/>
        <svg:desc/>
      </draw:frame>
      <draw:frame draw:id="id40" presentation:style-name="a228" draw:name="Текст 2" svg:x="0.9184in" svg:y="1.83854in" svg:width="5.64062in" svg:height="0.90104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Образец текста</text:span></text:p>
            </text:list-item>
          </text:list>
        </draw:text-box>
        <svg:title/>
        <svg:desc/>
      </draw:frame>
      <draw:frame draw:id="id41" presentation:style-name="a243" draw:name="Объект 3" svg:x="0.9184in" svg:y="2.73958in" svg:width="5.64062in" svg:height="4.02951in" presentation:class="object" presentation:placeholder="false">
        <draw:text-box>
          <text:p text:style-name="a230" text:class-names="" text:cond-style-name=""><text:span text:style-name="a229" text:class-names="">Образец текста</text:span></text:p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Второй уровень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47" draw:name="Текст 4" svg:x="6.75in" svg:y="1.83854in" svg:width="5.6684in" svg:height="0.90104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Образец текста</text:span></text:p>
            </text:list-item>
          </text:list>
        </draw:text-box>
        <svg:title/>
        <svg:desc/>
      </draw:frame>
      <draw:frame draw:id="id43" presentation:style-name="a262" draw:name="Объект 5" svg:x="6.75in" svg:y="2.73958in" svg:width="5.6684in" svg:height="4.02951in" presentation:class="object" presentation:placeholder="false">
        <draw:text-box>
          <text:p text:style-name="a249" text:class-names="" text:cond-style-name=""><text:span text:style-name="a248" text:class-names="">Образец текста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Второй уровень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6" presentation:style-name="a269" draw:name="Образ слайда 1">
          <svg:title/>
          <svg:desc/>
        </draw:page-thumbnail>
        <draw:frame draw:id="id7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8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9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0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1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custom-shape svg:x="0.52283in" svg:y="0.00039in" svg:width="0.24921in" svg:height="7.49921in" draw:id="id46" draw:layer="Master1-bg" draw:style-name="a289" draw:name="Rectangle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47">
        <svg:title/>
        <svg:desc/>
        <draw:custom-shape svg:x="8.91496in" svg:y="1.8437in" svg:width="3.58071in" svg:height="4.82008in" draw:id="id49" draw:layer="Master1-bg" draw:style-name="a295" draw:name="Freeform 6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50" draw:layer="Master1-bg" draw:style-name="a298" draw:name="Freeform 6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48" presentation:style-name="a292" draw:name="Заголовок 1" svg:x="1.5in" svg:y="0.75in" svg:width="10.49921in" svg:height="1.62441in" presentation:class="title" presentation:placeholder="false">
        <draw:text-box>
          <text:p text:style-name="a291" text:class-names="" text:cond-style-name=""><text:span text:style-name="a290" text:class-names="">Образец заголовка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Образ слайда 1">
          <svg:title/>
          <svg:desc/>
        </draw:page-thumbnail>
        <draw:frame draw:id="id7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custom-shape svg:x="0.52283in" svg:y="0.00039in" svg:width="0.24921in" svg:height="7.49921in" draw:id="id51" draw:layer="Master1-bg" draw:style-name="a319" draw:name="Rectangle 8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52">
        <svg:title/>
        <svg:desc/>
        <draw:custom-shape svg:x="8.91496in" svg:y="1.8437in" svg:width="3.58071in" svg:height="4.82008in" draw:id="id53" draw:layer="Master1-bg" draw:style-name="a322" draw:name="Freeform 6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54" draw:layer="Master1-bg" draw:style-name="a325" draw:name="Freeform 6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342">
        <draw:page-thumbnail svg:x="1.21063in" svg:y="0.88858in" svg:width="5.84567in" svg:height="4.38425in" presentation:class="page" draw:id="id6" presentation:style-name="a326" draw:name="Образ слайда 1">
          <svg:title/>
          <svg:desc/>
        </draw:page-thumbnail>
        <draw:frame draw:id="id7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8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9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0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1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custom-shape svg:x="0.52283in" svg:y="0.00039in" svg:width="0.24921in" svg:height="7.49921in" draw:id="id55" draw:layer="Master1-bg" draw:style-name="a346" draw:name="Rectangle 8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56">
        <svg:title/>
        <svg:desc/>
        <draw:custom-shape svg:x="8.91496in" svg:y="1.8437in" svg:width="3.58071in" svg:height="4.82008in" draw:id="id60" draw:layer="Master1-bg" draw:style-name="a371" draw:name="Freeform 6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61" draw:layer="Master1-bg" draw:style-name="a374" draw:name="Freeform 6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57" presentation:style-name="a349" draw:name="Заголовок 1" svg:x="0.9184in" svg:y="0.5in" svg:width="4.30035in" svg:height="1.75in" presentation:class="title" presentation:placeholder="false">
        <draw:text-box>
          <text:p text:style-name="a348" text:class-names="" text:cond-style-name=""><text:span text:style-name="a347" text:class-names="">Образец заголовка</text:span></text:p>
        </draw:text-box>
        <svg:title/>
        <svg:desc/>
      </draw:frame>
      <draw:frame draw:id="id58" presentation:style-name="a364" draw:name="Объект 2" svg:x="5.6684in" svg:y="1.07986in" svg:width="6.75in" svg:height="5.32986in" presentation:class="object" presentation:placeholder="false">
        <draw:text-box>
          <text:p text:style-name="a351" text:class-names="" text:cond-style-name=""><text:span text:style-name="a350" text:class-names="">Образец текста</text:span></text:p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Второй уровень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68" draw:name="Текст 3" svg:x="0.9184in" svg:y="2.25in" svg:width="4.30035in" svg:height="4.1684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6" presentation:style-name="a375" draw:name="Образ слайда 1">
          <svg:title/>
          <svg:desc/>
        </draw:page-thumbnail>
        <draw:frame draw:id="id7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8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9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0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custom-shape svg:x="0.52283in" svg:y="0.00039in" svg:width="0.24921in" svg:height="7.49921in" draw:id="id62" draw:layer="Master1-bg" draw:style-name="a395" draw:name="Rectangle 8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63">
        <svg:title/>
        <svg:desc/>
        <draw:custom-shape svg:x="8.91496in" svg:y="1.8437in" svg:width="3.58071in" svg:height="4.82008in" draw:id="id67" draw:layer="Master1-bg" draw:style-name="a408" draw:name="Freeform 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68" draw:layer="Master1-bg" draw:style-name="a411" draw:name="Freeform 6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64" presentation:style-name="a398" draw:name="Заголовок 1" svg:x="0.9184in" svg:y="0.5in" svg:width="4.30035in" svg:height="1.75in" presentation:class="title" presentation:placeholder="false">
        <draw:text-box>
          <text:p text:style-name="a397" text:class-names="" text:cond-style-name=""><text:span text:style-name="a396" text:class-names="">Образец заголовка</text:span></text:p>
        </draw:text-box>
        <svg:title/>
        <svg:desc/>
      </draw:frame>
      <draw:frame draw:id="id65" presentation:style-name="a401" draw:name="Рисунок 2" svg:x="5.6684in" svg:y="1.07986in" svg:width="6.75in" svg:height="5.32986in" presentation:class="graphic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66" presentation:style-name="a405" draw:name="Текст 3" svg:x="0.9184in" svg:y="2.25in" svg:width="4.30035in" svg:height="4.1684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6" presentation:style-name="a412" draw:name="Образ слайда 1">
          <svg:title/>
          <svg:desc/>
        </draw:page-thumbnail>
        <draw:frame draw:id="id7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1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custom-shape svg:x="0.52283in" svg:y="0.00039in" svg:width="0.24921in" svg:height="7.49921in" draw:id="id69" draw:layer="Master1-bg" draw:style-name="a432" draw:name="Rectangle 8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70">
        <svg:title/>
        <svg:desc/>
        <draw:custom-shape svg:x="8.91496in" svg:y="1.8437in" svg:width="3.58071in" svg:height="4.82008in" draw:id="id73" draw:layer="Master1-bg" draw:style-name="a454" draw:name="Freeform 6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74" draw:layer="Master1-bg" draw:style-name="a457" draw:name="Freeform 6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71" presentation:style-name="a435" draw:name="Заголовок 1" svg:x="1.5in" svg:y="0.75in" svg:width="10.49921in" svg:height="1.62441in" presentation:class="title" presentation:placeholder="false">
        <draw:text-box>
          <text:p text:style-name="a434" text:class-names="" text:cond-style-name=""><text:span text:style-name="a433" text:class-names="">Образец заголовка</text:span></text:p>
        </draw:text-box>
        <svg:title/>
        <svg:desc/>
      </draw:frame>
      <draw:frame draw:id="id72" presentation:style-name="a451" draw:name="Вертикальный текст 2" svg:x="0.66654in" svg:y="1.75472in" svg:width="11.99961in" svg:height="4.9496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Образец текста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Второй уровень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6" presentation:style-name="a458" draw:name="Образ слайда 1">
          <svg:title/>
          <svg:desc/>
        </draw:page-thumbnail>
        <draw:frame draw:id="id7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1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custom-shape svg:x="0.52283in" svg:y="0.00039in" svg:width="0.24921in" svg:height="7.49921in" draw:id="id75" draw:layer="Master1-bg" draw:style-name="a478" draw:name="Rectangle 8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Group 6" draw:id="id76">
        <svg:title/>
        <svg:desc/>
        <draw:custom-shape svg:x="8.91496in" svg:y="1.8437in" svg:width="3.58071in" svg:height="4.82008in" draw:id="id79" draw:layer="Master1-bg" draw:style-name="a500" draw:name="Freeform 6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087in" svg:y="0.81142in" svg:width="3.5815in" svg:height="4.82008in" draw:id="id80" draw:layer="Master1-bg" draw:style-name="a503" draw:name="Freeform 6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77" presentation:style-name="a481" draw:name="Вертикальный заголовок 1" svg:x="9.66667in" svg:y="0.75in" svg:width="3in" svg:height="5.95486in" presentation:class="title" presentation:placeholder="false">
        <draw:text-box>
          <text:p text:style-name="a480" text:class-names="" text:cond-style-name=""><text:span text:style-name="a479" text:class-names="">Образец заголовка</text:span></text:p>
        </draw:text-box>
        <svg:title/>
        <svg:desc/>
      </draw:frame>
      <draw:frame draw:id="id78" presentation:style-name="a497" draw:name="Вертикальный текст 2" svg:x="0.66667in" svg:y="0.75in" svg:width="8.83333in" svg:height="5.95486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Образец текста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Второй уровень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6" presentation:style-name="a504" draw:name="Образ слайда 1">
          <svg:title/>
          <svg:desc/>
        </draw:page-thumbnail>
        <draw:frame draw:id="id7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8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9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0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1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-1" style:page-layout-name="pageLayout1" draw:style-name="a521">
      <draw:custom-shape svg:x="0.52283in" svg:y="0.00039in" svg:width="0.24921in" svg:height="7.49921in" draw:id="id81" draw:style-name="a524" draw:name="Rectangle 8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2" presentation:style-name="a527" draw:name="Заголовок 2" svg:x="0.66654in" svg:y="0.29921in" svg:width="11.99961in" svg:height="1.25197in" presentation:class="titl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83" presentation:style-name="a543" draw:name="Текст 3" svg:x="0.66654in" svg:y="1.75472in" svg:width="11.99961in" svg:height="4.9496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Образец текста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Второй уровень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4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0">
        <draw:page-thumbnail svg:x="1.21063in" svg:y="0.88858in" svg:width="5.84567in" svg:height="4.38425in" presentation:class="page" draw:id="id6" presentation:style-name="a544" draw:name="Образ слайда 1">
          <svg:title/>
          <svg:desc/>
        </draw:page-thumbnail>
        <draw:frame draw:id="id7" presentation:style-name="a547" draw:name="Заметки 2" svg:x="0.82677in" svg:y="5.55394in" svg:width="6.61378in" svg:height="5.26142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Верхний колонтитул 3" svg:x="0in" svg:y="0in" svg:width="3.5878in" svg:height="0.58425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3" draw:name="Дата 4" svg:x="4.67953in" svg:y="0in" svg:width="3.5878in" svg:height="0.58425in" presentation:class="date-time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Нижний колонтитул 5" svg:x="0in" svg:y="11.10827in" svg:width="3.5878in" svg:height="0.58425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1" presentation:style-name="a559" draw:name="Номер слайда 6" svg:x="4.67953in" svg:y="11.10827in" svg:width="3.5878in" svg:height="0.58425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61">
      <draw:custom-shape svg:x="0.52283in" svg:y="0.00039in" svg:width="0.24921in" svg:height="7.49921in" draw:id="id84" draw:layer="Master2-bg" draw:style-name="a564" draw:name="Rectangle 8">
        <svg:title/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5" presentation:style-name="a567" draw:name="Заголовок 1" svg:x="1.66667in" svg:y="1.22743in" svg:width="10in" svg:height="2.61111in" presentation:class="title" presentation:placeholder="false">
        <draw:text-box>
          <text:p text:style-name="a566" text:class-names="" text:cond-style-name=""><text:span text:style-name="a565" text:class-names="">Образец заголовка</text:span></text:p>
        </draw:text-box>
        <svg:title/>
        <svg:desc/>
      </draw:frame>
      <draw:frame draw:id="id86" presentation:style-name="a570" draw:name="Подзаголовок 2" svg:x="1.66667in" svg:y="3.93924in" svg:width="10in" svg:height="1.81076in" presentation:class="subtitle" presentation:placeholder="false">
        <draw:text-box>
          <text:p text:style-name="a569" text:class-names="" text:cond-style-name=""><text:span text:style-name="a568" text:class-names="">Образец подзаголовка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6" presentation:style-name="a571" draw:name="Образ слайда 1">
          <svg:title/>
          <svg:desc/>
        </draw:page-thumbnail>
        <draw:frame draw:id="id7" presentation:style-name="a574" draw:name="Заметки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Верхний колонтитул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Дата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Нижний колонтитул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Номер слайда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88">
      <draw:custom-shape svg:x="0.52283in" svg:y="0.00039in" svg:width="0.24921in" svg:height="7.49921in" draw:id="id87" draw:layer="Master2-bg" draw:style-name="a591" draw:name="Rectangle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594" draw:name="Заголовок 1" svg:x="0.66654in" svg:y="0.29921in" svg:width="11.99961in" svg:height="1.25197in" presentation:class="title" presentation:placeholder="false">
        <draw:text-box>
          <text:p text:style-name="a593" text:class-names="" text:cond-style-name=""><text:span text:style-name="a592" text:class-names="">Образец заголовка</text:span></text:p>
        </draw:text-box>
        <svg:title/>
        <svg:desc/>
      </draw:frame>
      <draw:frame draw:id="id89" presentation:style-name="a609" draw:name="Объект 2" svg:x="0.66654in" svg:y="1.75472in" svg:width="11.99961in" svg:height="4.94961in" presentation:class="object" presentation:placeholder="false">
        <draw:text-box>
          <text:p text:style-name="a596" text:class-names="" text:cond-style-name=""><text:span text:style-name="a595" text:class-names="">Образец текста</text:span></text:p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Второй уровень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26">
        <draw:page-thumbnail svg:x="1.21063in" svg:y="0.88858in" svg:width="5.84567in" svg:height="4.38425in" presentation:class="page" draw:id="id6" presentation:style-name="a610" draw:name="Образ слайда 1">
          <svg:title/>
          <svg:desc/>
        </draw:page-thumbnail>
        <draw:frame draw:id="id7" presentation:style-name="a613" draw:name="Заметки 2" svg:x="0.82677in" svg:y="5.55394in" svg:width="6.61378in" svg:height="5.26142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8" presentation:style-name="a616" draw:name="Верхний колонтитул 3" svg:x="0in" svg:y="0in" svg:width="3.5878in" svg:height="0.58425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9" presentation:style-name="a619" draw:name="Дата 4" svg:x="4.67953in" svg:y="0in" svg:width="3.5878in" svg:height="0.58425in" presentation:class="date-time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Нижний колонтитул 5" svg:x="0in" svg:y="11.10827in" svg:width="3.5878in" svg:height="0.58425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1" presentation:style-name="a625" draw:name="Номер слайда 6" svg:x="4.67953in" svg:y="11.10827in" svg:width="3.5878in" svg:height="0.58425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27">
      <draw:custom-shape svg:x="0.52283in" svg:y="0.00039in" svg:width="0.24921in" svg:height="7.49921in" draw:id="id90" draw:layer="Master2-bg" draw:style-name="a630" draw:name="Rectangle 8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1" presentation:style-name="a633" draw:name="Заголовок 1" svg:x="0.90972in" svg:y="1.86979in" svg:width="11.5in" svg:height="3.11979in" presentation:class="title" presentation:placeholder="false">
        <draw:text-box>
          <text:p text:style-name="a632" text:class-names="" text:cond-style-name=""><text:span text:style-name="a631" text:class-names="">Образец заголовка</text:span></text:p>
        </draw:text-box>
        <svg:title/>
        <svg:desc/>
      </draw:frame>
      <draw:frame draw:id="id92" presentation:style-name="a637" draw:name="Текст 2" svg:x="0.90972in" svg:y="5.0191in" svg:width="11.5in" svg:height="1.64062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6" presentation:style-name="a638" draw:name="Образ слайда 1">
          <svg:title/>
          <svg:desc/>
        </draw:page-thumbnail>
        <draw:frame draw:id="id7" presentation:style-name="a641" draw:name="Заметки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8" presentation:style-name="a644" draw:name="Верхний колонтитул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9" presentation:style-name="a647" draw:name="Дата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0" draw:name="Нижний колонтитул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1" presentation:style-name="a653" draw:name="Номер слайда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55">
      <draw:custom-shape svg:x="0.52283in" svg:y="0.00039in" svg:width="0.24921in" svg:height="7.49921in" draw:id="id93" draw:layer="Master2-bg" draw:style-name="a658" draw:name="Rectangle 8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61" draw:name="Заголовок 1" svg:x="0.66654in" svg:y="0.29921in" svg:width="11.99961in" svg:height="1.25197in" presentation:class="title" presentation:placeholder="false">
        <draw:text-box>
          <text:p text:style-name="a660" text:class-names="" text:cond-style-name=""><text:span text:style-name="a659" text:class-names="">Образец заголовка</text:span></text:p>
        </draw:text-box>
        <svg:title/>
        <svg:desc/>
      </draw:frame>
      <draw:frame draw:id="id95" presentation:style-name="a676" draw:name="Объект 2" svg:x="0.66667in" svg:y="1.75521in" svg:width="5.91667in" svg:height="4.94965in" presentation:class="object" presentation:placeholder="false">
        <draw:text-box>
          <text:p text:style-name="a663" text:class-names="" text:cond-style-name=""><text:span text:style-name="a662" text:class-names="">Образец текста</text:span></text:p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Второй уровень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91" draw:name="Объект 3" svg:x="6.75in" svg:y="1.75521in" svg:width="5.91667in" svg:height="4.94965in" presentation:class="object" presentation:placeholder="false">
        <draw:text-box>
          <text:p text:style-name="a678" text:class-names="" text:cond-style-name=""><text:span text:style-name="a677" text:class-names="">Образец текста</text:span></text:p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Второй уровень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08">
        <draw:page-thumbnail svg:x="1.21063in" svg:y="0.88858in" svg:width="5.84567in" svg:height="4.38425in" presentation:class="page" draw:id="id6" presentation:style-name="a692" draw:name="Образ слайда 1">
          <svg:title/>
          <svg:desc/>
        </draw:page-thumbnail>
        <draw:frame draw:id="id7" presentation:style-name="a695" draw:name="Заметки 2" svg:x="0.82677in" svg:y="5.55394in" svg:width="6.61378in" svg:height="5.26142in" presentation:class="notes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8" presentation:style-name="a698" draw:name="Верхний колонтитул 3" svg:x="0in" svg:y="0in" svg:width="3.5878in" svg:height="0.58425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9" presentation:style-name="a701" draw:name="Дата 4" svg:x="4.67953in" svg:y="0in" svg:width="3.5878in" svg:height="0.58425in" presentation:class="date-time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0" presentation:style-name="a704" draw:name="Нижний колонтитул 5" svg:x="0in" svg:y="11.10827in" svg:width="3.5878in" svg:height="0.58425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1" presentation:style-name="a707" draw:name="Номер слайда 6" svg:x="4.67953in" svg:y="11.10827in" svg:width="3.5878in" svg:height="0.58425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09">
      <draw:custom-shape svg:x="0.52283in" svg:y="0.00039in" svg:width="0.24921in" svg:height="7.49921in" draw:id="id97" draw:layer="Master2-bg" draw:style-name="a712" draw:name="Rectangle 8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8" presentation:style-name="a715" draw:name="Заголовок 1" svg:x="0.9184in" svg:y="0.39931in" svg:width="11.5in" svg:height="1.44965in" presentation:class="title" presentation:placeholder="false">
        <draw:text-box>
          <text:p text:style-name="a714" text:class-names="" text:cond-style-name=""><text:span text:style-name="a713" text:class-names="">Образец заголовка</text:span></text:p>
        </draw:text-box>
        <svg:title/>
        <svg:desc/>
      </draw:frame>
      <draw:frame draw:id="id99" presentation:style-name="a719" draw:name="Текст 2" svg:x="0.9184in" svg:y="1.83854in" svg:width="5.64062in" svg:height="0.90104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Образец текста</text:span></text:p>
            </text:list-item>
          </text:list>
        </draw:text-box>
        <svg:title/>
        <svg:desc/>
      </draw:frame>
      <draw:frame draw:id="id100" presentation:style-name="a734" draw:name="Объект 3" svg:x="0.9184in" svg:y="2.73958in" svg:width="5.64062in" svg:height="4.02951in" presentation:class="object" presentation:placeholder="false">
        <draw:text-box>
          <text:p text:style-name="a721" text:class-names="" text:cond-style-name=""><text:span text:style-name="a720" text:class-names="">Образец текста</text:span></text:p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Второй уровень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38" draw:name="Текст 4" svg:x="6.75in" svg:y="1.83854in" svg:width="5.6684in" svg:height="0.90104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Образец текста</text:span></text:p>
            </text:list-item>
          </text:list>
        </draw:text-box>
        <svg:title/>
        <svg:desc/>
      </draw:frame>
      <draw:frame draw:id="id102" presentation:style-name="a753" draw:name="Объект 5" svg:x="6.75in" svg:y="2.73958in" svg:width="5.6684in" svg:height="4.02951in" presentation:class="object" presentation:placeholder="false">
        <draw:text-box>
          <text:p text:style-name="a740" text:class-names="" text:cond-style-name=""><text:span text:style-name="a739" text:class-names="">Образец текста</text:span></text:p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Второй уровень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list text:style-name="a752">
                            <text:list-item>
                              <text:p text:style-name="a751" text:class-names="" text:cond-style-name=""><text:span text:style-name="a75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0">
        <draw:page-thumbnail svg:x="1.21063in" svg:y="0.88858in" svg:width="5.84567in" svg:height="4.38425in" presentation:class="page" draw:id="id6" presentation:style-name="a754" draw:name="Образ слайда 1">
          <svg:title/>
          <svg:desc/>
        </draw:page-thumbnail>
        <draw:frame draw:id="id7" presentation:style-name="a757" draw:name="Заметки 2" svg:x="0.82677in" svg:y="5.55394in" svg:width="6.61378in" svg:height="5.26142in" presentation:class="notes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8" presentation:style-name="a760" draw:name="Верхний колонтитул 3" svg:x="0in" svg:y="0in" svg:width="3.5878in" svg:height="0.58425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9" presentation:style-name="a763" draw:name="Дата 4" svg:x="4.67953in" svg:y="0in" svg:width="3.5878in" svg:height="0.58425in" presentation:class="date-time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Нижний колонтитул 5" svg:x="0in" svg:y="11.10827in" svg:width="3.5878in" svg:height="0.5842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Номер слайда 6" svg:x="4.67953in" svg:y="11.10827in" svg:width="3.5878in" svg:height="0.5842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71">
      <draw:custom-shape svg:x="0.52283in" svg:y="0.00039in" svg:width="0.24921in" svg:height="7.49921in" draw:id="id103" draw:layer="Master2-bg" draw:style-name="a774" draw:name="Rectangle 8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77" draw:name="Заголовок 1" svg:x="0.66654in" svg:y="0.29921in" svg:width="11.99961in" svg:height="1.25197in" presentation:class="title" presentation:placeholder="false">
        <draw:text-box>
          <text:p text:style-name="a776" text:class-names="" text:cond-style-name=""><text:span text:style-name="a775" text:class-names="">Образец заголовка</text:span></text:p>
        </draw:text-box>
        <svg:title/>
        <svg:desc/>
      </draw:frame>
      <presentation:notes style:page-layout-name="pageLayout2" draw:style-name="a794">
        <draw:page-thumbnail svg:x="1.21063in" svg:y="0.88858in" svg:width="5.84567in" svg:height="4.38425in" presentation:class="page" draw:id="id6" presentation:style-name="a778" draw:name="Образ слайда 1">
          <svg:title/>
          <svg:desc/>
        </draw:page-thumbnail>
        <draw:frame draw:id="id7" presentation:style-name="a781" draw:name="Заметки 2" svg:x="0.82677in" svg:y="5.55394in" svg:width="6.61378in" svg:height="5.26142in" presentation:class="notes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8" presentation:style-name="a784" draw:name="Верхний колонтитул 3" svg:x="0in" svg:y="0in" svg:width="3.5878in" svg:height="0.58425in" presentation:class="head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9" presentation:style-name="a787" draw:name="Дата 4" svg:x="4.67953in" svg:y="0in" svg:width="3.5878in" svg:height="0.58425in" presentation:class="date-time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0" draw:name="Нижний колонтитул 5" svg:x="0in" svg:y="11.10827in" svg:width="3.5878in" svg:height="0.58425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1" presentation:style-name="a793" draw:name="Номер слайда 6" svg:x="4.67953in" svg:y="11.10827in" svg:width="3.5878in" svg:height="0.58425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95">
      <draw:custom-shape svg:x="0.52283in" svg:y="0.00039in" svg:width="0.24921in" svg:height="7.49921in" draw:id="id105" draw:layer="Master2-bg" draw:style-name="a798" draw:name="Rectangle 8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815">
        <draw:page-thumbnail svg:x="1.21063in" svg:y="0.88858in" svg:width="5.84567in" svg:height="4.38425in" presentation:class="page" draw:id="id6" presentation:style-name="a799" draw:name="Образ слайда 1">
          <svg:title/>
          <svg:desc/>
        </draw:page-thumbnail>
        <draw:frame draw:id="id7" presentation:style-name="a802" draw:name="Заметки 2" svg:x="0.82677in" svg:y="5.55394in" svg:width="6.61378in" svg:height="5.26142in" presentation:class="notes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Верхний колонтитул 3" svg:x="0in" svg:y="0in" svg:width="3.5878in" svg:height="0.58425in" presentation:class="head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Дата 4" svg:x="4.67953in" svg:y="0in" svg:width="3.5878in" svg:height="0.58425in" presentation:class="date-time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Нижний колонтитул 5" svg:x="0in" svg:y="11.10827in" svg:width="3.5878in" svg:height="0.58425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1" presentation:style-name="a814" draw:name="Номер слайда 6" svg:x="4.67953in" svg:y="11.10827in" svg:width="3.5878in" svg:height="0.58425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816">
      <draw:custom-shape svg:x="0.52283in" svg:y="0.00039in" svg:width="0.24921in" svg:height="7.49921in" draw:id="id106" draw:layer="Master2-bg" draw:style-name="a819" draw:name="Rectangle 8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7" presentation:style-name="a822" draw:name="Заголовок 1" svg:x="0.9184in" svg:y="0.5in" svg:width="4.30035in" svg:height="1.75in" presentation:class="title" presentation:placeholder="false">
        <draw:text-box>
          <text:p text:style-name="a821" text:class-names="" text:cond-style-name=""><text:span text:style-name="a820" text:class-names="">Образец заголовка</text:span></text:p>
        </draw:text-box>
        <svg:title/>
        <svg:desc/>
      </draw:frame>
      <draw:frame draw:id="id108" presentation:style-name="a837" draw:name="Объект 2" svg:x="5.6684in" svg:y="1.07986in" svg:width="6.75in" svg:height="5.32986in" presentation:class="object" presentation:placeholder="false">
        <draw:text-box>
          <text:p text:style-name="a824" text:class-names="" text:cond-style-name=""><text:span text:style-name="a823" text:class-names="">Образец текста</text:span></text:p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Второй уровень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41" draw:name="Текст 3" svg:x="0.9184in" svg:y="2.25in" svg:width="4.30035in" svg:height="4.1684in" presentation:class="outline" presentation:placeholder="false">
        <draw:text-box>
          <text:list text:style-name="a840">
            <text:list-item>
              <text:p text:style-name="a839" text:class-names="" text:cond-style-name=""><text:span text:style-name="a838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58">
        <draw:page-thumbnail svg:x="1.21063in" svg:y="0.88858in" svg:width="5.84567in" svg:height="4.38425in" presentation:class="page" draw:id="id6" presentation:style-name="a842" draw:name="Образ слайда 1">
          <svg:title/>
          <svg:desc/>
        </draw:page-thumbnail>
        <draw:frame draw:id="id7" presentation:style-name="a845" draw:name="Заметки 2" svg:x="0.82677in" svg:y="5.55394in" svg:width="6.61378in" svg:height="5.26142in" presentation:class="notes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Верхний колонтитул 3" svg:x="0in" svg:y="0in" svg:width="3.5878in" svg:height="0.5842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Дата 4" svg:x="4.67953in" svg:y="0in" svg:width="3.5878in" svg:height="0.5842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Нижний колонтитул 5" svg:x="0in" svg:y="11.10827in" svg:width="3.5878in" svg:height="0.5842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1" presentation:style-name="a857" draw:name="Номер слайда 6" svg:x="4.67953in" svg:y="11.10827in" svg:width="3.5878in" svg:height="0.5842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59">
      <draw:custom-shape svg:x="0.52283in" svg:y="0.00039in" svg:width="0.24921in" svg:height="7.49921in" draw:id="id110" draw:layer="Master2-bg" draw:style-name="a862" draw:name="Rectangle 8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865" draw:name="Заголовок 1" svg:x="0.9184in" svg:y="0.5in" svg:width="4.30035in" svg:height="1.75in" presentation:class="title" presentation:placeholder="false">
        <draw:text-box>
          <text:p text:style-name="a864" text:class-names="" text:cond-style-name=""><text:span text:style-name="a863" text:class-names="">Образец заголовка</text:span></text:p>
        </draw:text-box>
        <svg:title/>
        <svg:desc/>
      </draw:frame>
      <draw:frame draw:id="id112" presentation:style-name="a868" draw:name="Рисунок 2" svg:x="5.6684in" svg:y="1.07986in" svg:width="6.75in" svg:height="5.32986in" presentation:class="graphic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13" presentation:style-name="a872" draw:name="Текст 3" svg:x="0.9184in" svg:y="2.25in" svg:width="4.30035in" svg:height="4.1684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89">
        <draw:page-thumbnail svg:x="1.21063in" svg:y="0.88858in" svg:width="5.84567in" svg:height="4.38425in" presentation:class="page" draw:id="id6" presentation:style-name="a873" draw:name="Образ слайда 1">
          <svg:title/>
          <svg:desc/>
        </draw:page-thumbnail>
        <draw:frame draw:id="id7" presentation:style-name="a876" draw:name="Заметки 2" svg:x="0.82677in" svg:y="5.55394in" svg:width="6.61378in" svg:height="5.26142in" presentation:class="notes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8" presentation:style-name="a879" draw:name="Верхний колонтитул 3" svg:x="0in" svg:y="0in" svg:width="3.5878in" svg:height="0.58425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9" presentation:style-name="a882" draw:name="Дата 4" svg:x="4.67953in" svg:y="0in" svg:width="3.5878in" svg:height="0.58425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0" presentation:style-name="a885" draw:name="Нижний колонтитул 5" svg:x="0in" svg:y="11.10827in" svg:width="3.5878in" svg:height="0.58425in" presentation:class="foot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1" presentation:style-name="a888" draw:name="Номер слайда 6" svg:x="4.67953in" svg:y="11.10827in" svg:width="3.5878in" svg:height="0.58425in" presentation:class="page-number" presentation:placeholder="false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90">
      <draw:custom-shape svg:x="0.52283in" svg:y="0.00039in" svg:width="0.24921in" svg:height="7.49921in" draw:id="id114" draw:layer="Master2-bg" draw:style-name="a893" draw:name="Rectangle 8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5" presentation:style-name="a896" draw:name="Заголовок 1" svg:x="0.66654in" svg:y="0.29921in" svg:width="11.99961in" svg:height="1.25197in" presentation:class="title" presentation:placeholder="false">
        <draw:text-box>
          <text:p text:style-name="a895" text:class-names="" text:cond-style-name=""><text:span text:style-name="a894" text:class-names="">Образец заголовка</text:span></text:p>
        </draw:text-box>
        <svg:title/>
        <svg:desc/>
      </draw:frame>
      <draw:frame draw:id="id116" presentation:style-name="a912" draw:name="Вертикальный текст 2" svg:x="0.66654in" svg:y="1.75472in" svg:width="11.99961in" svg:height="4.94961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Образец текста</text:span></text:p>
            </text:list-item>
          </text:list>
          <text:list text:style-name="a902">
            <text:list-item>
              <text:list text:style-name="a902">
                <text:list-item>
                  <text:p text:style-name="a901" text:class-names="" text:cond-style-name=""><text:span text:style-name="a900" text:class-names="">Второй уровень</text:span></text:p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p text:style-name="a904" text:class-names="" text:cond-style-name=""><text:span text:style-name="a9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p text:style-name="a907" text:class-names="" text:cond-style-name=""><text:span text:style-name="a9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9">
        <draw:page-thumbnail svg:x="1.21063in" svg:y="0.88858in" svg:width="5.84567in" svg:height="4.38425in" presentation:class="page" draw:id="id6" presentation:style-name="a913" draw:name="Образ слайда 1">
          <svg:title/>
          <svg:desc/>
        </draw:page-thumbnail>
        <draw:frame draw:id="id7" presentation:style-name="a916" draw:name="Заметки 2" svg:x="0.82677in" svg:y="5.55394in" svg:width="6.61378in" svg:height="5.26142in" presentation:class="notes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8" presentation:style-name="a919" draw:name="Верхний колонтитул 3" svg:x="0in" svg:y="0in" svg:width="3.5878in" svg:height="0.58425in" presentation:class="head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9" presentation:style-name="a922" draw:name="Дата 4" svg:x="4.67953in" svg:y="0in" svg:width="3.5878in" svg:height="0.58425in" presentation:class="date-time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5" draw:name="Нижний колонтитул 5" svg:x="0in" svg:y="11.10827in" svg:width="3.5878in" svg:height="0.58425in" presentation:class="foot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1" presentation:style-name="a928" draw:name="Номер слайда 6" svg:x="4.67953in" svg:y="11.10827in" svg:width="3.5878in" svg:height="0.58425in" presentation:class="page-number" presentation:placeholder="false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930">
      <draw:custom-shape svg:x="0.52283in" svg:y="0.00039in" svg:width="0.24921in" svg:height="7.49921in" draw:id="id117" draw:layer="Master2-bg" draw:style-name="a933" draw:name="Rectangle 8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936" draw:name="Вертикальный заголовок 1" svg:x="9.66667in" svg:y="0.29861in" svg:width="3in" svg:height="6.40625in" presentation:class="title" presentation:placeholder="false">
        <draw:text-box>
          <text:p text:style-name="a935" text:class-names="" text:cond-style-name=""><text:span text:style-name="a934" text:class-names="">Образец заголовка</text:span></text:p>
        </draw:text-box>
        <svg:title/>
        <svg:desc/>
      </draw:frame>
      <draw:frame draw:id="id119" presentation:style-name="a952" draw:name="Вертикальный текст 2" svg:x="0.66667in" svg:y="0.29861in" svg:width="8.83333in" svg:height="6.40625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Образец текста</text:span></text:p>
            </text:list-item>
          </text:list>
          <text:list text:style-name="a942">
            <text:list-item>
              <text:list text:style-name="a942">
                <text:list-item>
                  <text:p text:style-name="a941" text:class-names="" text:cond-style-name=""><text:span text:style-name="a940" text:class-names="">Второй уровень</text:span></text:p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p text:style-name="a944" text:class-names="" text:cond-style-name=""><text:span text:style-name="a94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list text:style-name="a948">
                        <text:list-item>
                          <text:p text:style-name="a947" text:class-names="" text:cond-style-name=""><text:span text:style-name="a94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list text:style-name="a951">
                            <text:list-item>
                              <text:p text:style-name="a950" text:class-names="" text:cond-style-name=""><text:span text:style-name="a94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69">
        <draw:page-thumbnail svg:x="1.21063in" svg:y="0.88858in" svg:width="5.84567in" svg:height="4.38425in" presentation:class="page" draw:id="id6" presentation:style-name="a953" draw:name="Образ слайда 1">
          <svg:title/>
          <svg:desc/>
        </draw:page-thumbnail>
        <draw:frame draw:id="id7" presentation:style-name="a956" draw:name="Заметки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Верхний колонтитул 3" svg:x="0in" svg:y="0in" svg:width="3.5878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Дата 4" svg:x="4.67953in" svg:y="0in" svg:width="3.5878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Нижний колонтитул 5" svg:x="0in" svg:y="11.10827in" svg:width="3.5878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1" presentation:style-name="a968" draw:name="Номер слайда 6" svg:x="4.67953in" svg:y="11.10827in" svg:width="3.5878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70">
      <draw:frame draw:id="id120" presentation:style-name="a973" draw:name="Верхний колонтитул 1" svg:x="0in" svg:y="0in" svg:width="3.5878in" svg:height="0.58425in" presentation:class="head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21" presentation:style-name="a976" draw:name="Дата 2" svg:x="4.67953in" svg:y="0in" svg:width="3.5878in" svg:height="0.58425in" presentation:class="date-tim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22" presentation:style-name="a979" draw:name="Нижний колонтитул 3" svg:x="0in" svg:y="11.10827in" svg:width="3.5878in" svg:height="0.58425in" presentation:class="footer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23" presentation:style-name="a982" draw:name="Номер слайда 4" svg:x="4.67953in" svg:y="11.10827in" svg:width="3.5878in" svg:height="0.58425in" presentation:class="page-number" presentation:placeholder="false">
        <draw:text-box>
          <text:p text:style-name="a981" text:class-names="" text:cond-style-name=""><text:span text:style-name="a98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Полина Шумилова</dc:creator>
    <dc:date>2025-03-18T17:25:26Z</dc:date>
    <meta:editing-cycles>16</meta:editing-cycles>
    <meta:editing-duration>PT16330S</meta:editing-duration>
    <meta:document-statistic meta:paragraph-count="55" meta:word-count="1270"/>
  </office:meta>
</office:document-meta>
</file>